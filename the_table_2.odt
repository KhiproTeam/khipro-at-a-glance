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July" svg:font-family="July"/>
    <style:font-face style:name="Kalpurush" svg:font-family="Kalpurush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2.1243in" table:align="left"/>
    </style:style>
    <style:style style:name="Table1.A" style:family="table-column">
      <style:table-column-properties style:column-width="1.0618in"/>
    </style:style>
    <style:style style:name="Table1.B" style:family="table-column">
      <style:table-column-properties style:column-width="1.0625in"/>
    </style:style>
    <style:style style:name="Table1.1" style:family="table-row">
      <style:table-row-properties style:min-row-height="0.3201in"/>
    </style:style>
    <style:style style:name="Table1.A1" style:family="table-cell">
      <style:table-cell-properties style:vertical-align="middle" fo:background-color="#d99795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2dcdc" fo:padding-left="0.075in" fo:padding-right="0.075in" fo:padding-top="0in" fo:padding-bottom="0in" fo:border="0.5pt solid #000000">
        <style:background-image/>
      </style:table-cell-properties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1.9403in" fo:margin-left="0.2111in" table:align="left"/>
    </style:style>
    <style:style style:name="Table2.A" style:family="table-column">
      <style:table-column-properties style:column-width="0.9396in"/>
    </style:style>
    <style:style style:name="Table2.B" style:family="table-column">
      <style:table-column-properties style:column-width="1.0007in"/>
    </style:style>
    <style:style style:name="Table2.1" style:family="table-row">
      <style:table-row-properties style:min-row-height="0.3201in"/>
    </style:style>
    <style:style style:name="Table2.A1" style:family="table-cell">
      <style:table-cell-properties style:vertical-align="middle" fo:background-color="#d99795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2dcdc" fo:padding-left="0.075in" fo:padding-right="0.075in" fo:padding-top="0in" fo:padding-bottom="0in" fo:border="0.5pt solid #000000">
        <style:background-image/>
      </style:table-cell-properties>
    </style:style>
    <style:style style:name="Table2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20" style:family="table-cell">
      <style:table-cell-properties style:vertical-align="middle" fo:background-color="#f2dcdc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A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1.7563in" fo:margin-left="0.2111in" table:align="left"/>
    </style:style>
    <style:style style:name="Table7.A" style:family="table-column">
      <style:table-column-properties style:column-width="0.8785in"/>
    </style:style>
    <style:style style:name="Table7.B" style:family="table-column">
      <style:table-column-properties style:column-width="0.8778in"/>
    </style:style>
    <style:style style:name="Table7.1" style:family="table-row">
      <style:table-row-properties style:min-row-height="0.3201in"/>
    </style:style>
    <style:style style:name="Table7.A1" style:family="table-cell">
      <style:table-cell-properties style:vertical-align="middle" fo:background-color="#f2dcdc" fo:padding-left="0.075in" fo:padding-right="0.075in" fo:padding-top="0in" fo:padding-bottom="0in" fo:border="0.5pt solid #000000">
        <style:background-image/>
      </style:table-cell-properties>
    </style:style>
    <style:style style:name="Table7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" style:family="table">
      <style:table-properties style:width="1.9403in" fo:margin-left="-0.0007in" table:align="left"/>
    </style:style>
    <style:style style:name="Table3.A" style:family="table-column">
      <style:table-column-properties style:column-width="1.0007in"/>
    </style:style>
    <style:style style:name="Table3.B" style:family="table-column">
      <style:table-column-properties style:column-width="0.9396in"/>
    </style:style>
    <style:style style:name="Table3.1" style:family="table-row">
      <style:table-row-properties style:min-row-height="0.3201in"/>
    </style:style>
    <style:style style:name="Table3.A1" style:family="table-cell">
      <style:table-cell-properties style:vertical-align="middle" fo:background-color="#d99795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middle" fo:background-color="#f2dcdc" fo:padding-left="0.075in" fo:padding-right="0.075in" fo:padding-top="0in" fo:padding-bottom="0in" fo:border="0.5pt solid #000000">
        <style:background-image/>
      </style:table-cell-properties>
    </style:style>
    <style:style style:name="Table3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" style:family="table">
      <style:table-properties style:width="1.9507in" table:align="left"/>
    </style:style>
    <style:style style:name="Table4.A" style:family="table-column">
      <style:table-column-properties style:column-width="1.0007in"/>
    </style:style>
    <style:style style:name="Table4.B" style:family="table-column">
      <style:table-column-properties style:column-width="0.95in"/>
    </style:style>
    <style:style style:name="Table4.1" style:family="table-row">
      <style:table-row-properties style:min-row-height="0.3201in"/>
    </style:style>
    <style:style style:name="Table4.A1" style:family="table-cell">
      <style:table-cell-properties style:vertical-align="middle" fo:background-color="#d99795" fo:padding-left="0.075in" fo:padding-right="0.075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6542in"/>
    </style:style>
    <style:style style:name="Table4.A2" style:family="table-cell">
      <style:table-cell-properties style:vertical-align="middle" fo:background-color="#f2dcdc" fo:padding-left="0.075in" fo:padding-right="0.075in" fo:padding-top="0in" fo:padding-bottom="0in" fo:border="0.5pt solid #000000">
        <style:background-image/>
      </style:table-cell-properties>
    </style:style>
    <style:style style:name="Table4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A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" style:family="table">
      <style:table-properties style:width="2.1319in" table:align="left"/>
    </style:style>
    <style:style style:name="Table5.A" style:family="table-column">
      <style:table-column-properties style:column-width="1.0743in"/>
    </style:style>
    <style:style style:name="Table5.B" style:family="table-column">
      <style:table-column-properties style:column-width="1.0576in"/>
    </style:style>
    <style:style style:name="Table5.1" style:family="table-row">
      <style:table-row-properties style:min-row-height="0.3201in"/>
    </style:style>
    <style:style style:name="Table5.A1" style:family="table-cell">
      <style:table-cell-properties style:vertical-align="middle" fo:background-color="#d99795" fo:padding-left="0.07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2dcdc" fo:padding-left="0.075in" fo:padding-right="0.075in" fo:padding-top="0in" fo:padding-bottom="0in" fo:border="0.5pt solid #000000">
        <style:background-image/>
      </style:table-cell-properties>
    </style:style>
    <style:style style:name="Table5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A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" style:family="table">
      <style:table-properties style:width="2.1319in" table:align="left"/>
    </style:style>
    <style:style style:name="Table6.A" style:family="table-column">
      <style:table-column-properties style:column-width="1.0743in"/>
    </style:style>
    <style:style style:name="Table6.B" style:family="table-column">
      <style:table-column-properties style:column-width="1.0576in"/>
    </style:style>
    <style:style style:name="Table6.1" style:family="table-row">
      <style:table-row-properties style:min-row-height="0.3201in"/>
    </style:style>
    <style:style style:name="Table6.A1" style:family="table-cell">
      <style:table-cell-properties style:vertical-align="middle" fo:background-color="#d99795" fo:padding-left="0.07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2dcdc" fo:padding-left="0.075in" fo:padding-right="0.075in" fo:padding-top="0in" fo:padding-bottom="0in" fo:border="0.5pt solid #000000">
        <style:background-image/>
      </style:table-cell-properties>
    </style:style>
    <style:style style:name="Table6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B3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auto"/>
      <style:text-properties fo:color="#000000" loext:opacity="100%" style:font-name="Kalpurush" fo:font-size="10pt" fo:language="en" fo:country="GB" fo:font-weight="normal" style:font-size-asian="10pt" style:font-weight-asian="normal" style:font-name-complex="Kalpurush" style:font-size-complex="10pt" style:language-complex="bn" style:country-complex="BD" style:font-weight-complex="normal"/>
    </style:style>
    <style:style style:name="P2" style:family="paragraph" style:parent-style-name="Table_20_Contents">
      <style:paragraph-properties fo:margin-top="0.0783in" fo:margin-bottom="0in" style:contextual-spacing="false" fo:text-align="center" style:justify-single-word="false"/>
      <style:text-properties fo:color="#000000" loext:opacity="100%" style:font-name="Kalpurush" fo:font-size="10pt" fo:language="en" fo:country="GB" fo:font-weight="bold" style:font-size-asian="10pt" style:font-weight-asian="bold" style:font-name-complex="Kalpurush" style:font-size-complex="10pt" style:language-complex="bn" style:country-complex="BD" style:font-weight-complex="bold"/>
    </style:style>
    <style:style style:name="P3" style:family="paragraph" style:parent-style-name="Table_20_Contents">
      <style:paragraph-properties fo:margin-top="0.0783in" fo:margin-bottom="0in" style:contextual-spacing="false" fo:text-align="center" style:justify-single-word="false"/>
      <style:text-properties fo:color="#000000" loext:opacity="100%" style:font-name="Kalpurush" fo:font-size="10pt" fo:language="en" fo:country="GB" style:font-size-asian="10pt" style:font-name-complex="Kalpurush" style:font-size-complex="10pt" style:language-complex="bn" style:country-complex="BD"/>
    </style:style>
    <style:style style:name="P4" style:family="paragraph" style:parent-style-name="Table_20_Contents">
      <style:paragraph-properties fo:margin-top="0.0783in" fo:margin-bottom="0in" style:contextual-spacing="false" fo:text-align="center" style:justify-single-word="false"/>
      <style:text-properties fo:color="#000000" loext:opacity="100%" style:text-line-through-style="none" style:text-line-through-type="none" style:font-name="Kalpurush" fo:font-size="10pt" fo:language="en" fo:country="GB" fo:font-style="normal" style:text-underline-style="none" fo:font-weight="normal" style:font-size-asian="10pt" style:font-name-complex="Kalpurush" style:font-size-complex="10pt" style:language-complex="bn" style:country-complex="BD"/>
    </style:style>
    <style:style style:name="P5" style:family="paragraph" style:parent-style-name="Standard">
      <style:paragraph-properties fo:margin-top="0.1181in" fo:margin-bottom="0in" style:contextual-spacing="false" fo:text-align="center" style:justify-single-word="false"/>
      <style:text-properties fo:color="#000000" loext:opacity="100%" style:font-name="Kalpurush" fo:font-size="10pt" fo:language="en" fo:country="GB" fo:font-weight="bold" style:font-size-asian="10pt" style:font-name-complex="Kalpurush" style:font-size-complex="10pt" style:language-complex="bn" style:country-complex="BD"/>
    </style:style>
    <style:style style:name="P6" style:family="paragraph" style:parent-style-name="Table_20_Contents">
      <style:paragraph-properties fo:margin-top="0.0783in" fo:margin-bottom="0in" style:contextual-spacing="false" fo:text-align="center" style:justify-single-word="false"/>
      <style:text-properties fo:color="#000000" loext:opacity="100%" style:text-line-through-style="none" style:text-line-through-type="none" style:font-name="Kalpurush" fo:font-size="10pt" fo:language="en" fo:country="GB" fo:font-style="normal" style:text-underline-style="none" fo:font-weight="bold" style:font-size-asian="10pt" style:font-weight-asian="bold" style:font-name-complex="Kalpurush" style:font-size-complex="10pt" style:language-complex="bn" style:country-complex="BD" style:font-weight-complex="bold"/>
    </style:style>
    <style:style style:name="P7" style:family="paragraph" style:parent-style-name="Table_20_Contents">
      <style:paragraph-properties fo:margin-top="0.0783in" fo:margin-bottom="0in" style:contextual-spacing="false" fo:text-align="center" style:justify-single-word="false"/>
      <style:text-properties fo:color="#000000" loext:opacity="100%" style:text-line-through-style="none" style:text-line-through-type="none" style:font-name="Kalpurush" fo:font-size="10pt" fo:language="en" fo:country="GB" fo:font-style="normal" style:text-underline-style="none" fo:font-weight="normal" officeooo:paragraph-rsid="001537cc" style:font-size-asian="10pt" style:font-name-complex="Kalpurush" style:font-size-complex="10pt" style:language-complex="bn" style:country-complex="BD"/>
    </style:style>
    <style:style style:name="P8" style:family="paragraph" style:parent-style-name="Standard">
      <style:paragraph-properties fo:margin-top="0.1181in" fo:margin-bottom="0in" style:contextual-spacing="false" fo:text-align="center" style:justify-single-word="false"/>
      <style:text-properties fo:color="#000000" loext:opacity="100%" style:font-name="Kalpurush" fo:font-size="10pt" fo:language="en" fo:country="GB" fo:font-weight="bold" officeooo:paragraph-rsid="001537cc" style:font-size-asian="10pt" style:font-name-complex="Kalpurush" style:font-size-complex="10pt" style:language-complex="bn" style:country-complex="BD"/>
    </style:style>
    <style:style style:name="P9" style:family="paragraph" style:parent-style-name="Standard">
      <style:paragraph-properties fo:margin-top="0.1181in" fo:margin-bottom="0in" style:contextual-spacing="false" fo:text-align="center" style:justify-single-word="false">
        <style:tab-stops>
          <style:tab-stop style:position="2.5465in"/>
        </style:tab-stops>
      </style:paragraph-properties>
      <style:text-properties fo:color="#000000" loext:opacity="100%" style:font-name="Kalpurush" fo:font-size="10pt" fo:language="en" fo:country="GB" fo:font-weight="bold" style:font-size-asian="10pt" style:font-name-complex="Kalpurush" style:font-size-complex="10pt" style:language-complex="bn" style:country-complex="BD"/>
    </style:style>
    <style:style style:name="P10" style:family="paragraph" style:parent-style-name="Standard">
      <style:paragraph-properties fo:margin-top="0.1181in" fo:margin-bottom="0in" style:contextual-spacing="false" fo:text-align="center" style:justify-single-word="false">
        <style:tab-stops>
          <style:tab-stop style:position="2.5465in"/>
        </style:tab-stops>
      </style:paragraph-properties>
      <style:text-properties fo:color="#000000" loext:opacity="100%" style:font-name="Kalpurush" fo:font-size="10pt" fo:language="en" fo:country="GB" fo:font-weight="normal" style:font-size-asian="10pt" style:font-weight-asian="normal" style:font-name-complex="Kalpurush" style:font-size-complex="10pt" style:language-complex="bn" style:country-complex="BD" style:font-weight-complex="normal"/>
    </style:style>
    <style:style style:name="P11" style:family="paragraph" style:parent-style-name="Standard">
      <style:paragraph-properties fo:margin-top="0.1181in" fo:margin-bottom="0in" style:contextual-spacing="false" fo:text-align="center" style:justify-single-word="false"/>
      <style:text-properties fo:color="#000000" loext:opacity="100%" style:font-name="Kalpurush" fo:font-size="10pt" fo:language="en" fo:country="GB" fo:font-weight="normal" style:font-size-asian="10pt" style:font-weight-asian="normal" style:font-name-complex="Kalpurush" style:font-size-complex="10pt" style:language-complex="bn" style:country-complex="BD" style:font-weight-complex="normal"/>
    </style:style>
    <style:style style:name="P12" style:family="paragraph" style:parent-style-name="Standard">
      <style:paragraph-properties fo:margin-top="0.0783in" fo:margin-bottom="0in" style:contextual-spacing="false" fo:text-align="left" style:justify-single-word="false">
        <style:tab-stops>
          <style:tab-stop style:position="2.5465in"/>
        </style:tab-stops>
      </style:paragraph-properties>
      <style:text-properties fo:color="#000000" loext:opacity="100%" style:font-name="Kalpurush" fo:font-size="10pt" fo:language="en" fo:country="GB" style:font-size-asian="10pt" style:font-name-complex="Kalpurush" style:font-size-complex="10pt" style:language-complex="bn" style:country-complex="BD"/>
    </style:style>
    <style:style style:name="T10" style:family="text">
      <style:text-properties fo:color="#000000" loext:opacity="100%" fo:language="en" fo:country="GB" style:language-complex="bn" style:country-complex="BD"/>
    </style:style>
    <style:style style:name="T11" style:family="text">
      <style:text-properties fo:font-weight="bold"/>
    </style:style>
    <style:style style:name="T12" style:family="text">
      <style:text-properties fo:color="#000000" loext:opacity="100%" fo:language="en" fo:country="GB" fo:font-weight="bold" style:language-complex="bn" style:country-complex="BD"/>
    </style:style>
    <style:style style:name="T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style:language-complex="bn" style:country-complex="BD"/>
    </style:style>
    <style:style style:name="T14" style:family="text">
      <style:text-properties fo:color="#ff0000" loext:opacity="100%"/>
    </style:style>
    <style:style style:name="T15" style:family="text">
      <style:text-properties fo:color="#808080" loext:opacity="100%"/>
    </style:style>
    <style:style style:name="T16" style:family="text">
      <style:text-properties fo:color="#000000" loext:opacity="100%" style:text-line-through-style="none" style:text-line-through-type="none" fo:language="en" fo:country="GB" fo:font-style="normal" style:text-underline-style="none" style:language-complex="bn" style:country-complex="BD"/>
    </style:style>
    <style:style style:name="T17" style:family="text">
      <style:text-properties fo:color="#0000cd" loext:opacity="100%"/>
    </style:style>
    <style:style style:name="T18" style:family="text">
      <style:text-properties fo:language="en" fo:country="US"/>
    </style:style>
    <style:style style:name="T19" style:family="text">
      <style:text-properties fo:color="#00008b" loext:opacity="100%" fo:font-weight="bold"/>
    </style:style>
    <style:style style:name="Sect1" style:family="section">
      <style:section-properties text:dont-balance-text-columns="true" style:editable="false">
        <style:columns fo:column-count="5">
          <style:column style:rel-width="17405*" fo:start-indent="0in" fo:end-indent="0.0661in"/>
          <style:column style:rel-width="10322*" fo:start-indent="0.0661in" fo:end-indent="0.0638in"/>
          <style:column style:rel-width="12966*" fo:start-indent="0.0638in" fo:end-indent="0.0654in"/>
          <style:column style:rel-width="11915*" fo:start-indent="0.0654in" fo:end-indent="0.0638in"/>
          <style:column style:rel-width="12322*" fo:start-indent="0.0638in" fo:end-indent="0.0602in"/>
        </style:columns>
      </style:section-properties>
    </style:style>
    <style:style style:name="Sect2" style:family="section">
      <style:section-properties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section text:style-name="Sect2" text:name="Section1">
          <text:p text:style-name="P1"><text:span text:style-name="T10"/></text:p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table:number-columns-spanned="2" office:value-type="string">
                <text:p text:style-name="P2">স্বর<text:span text:style-name="T10"/></text:p>
              </table:table-cell>
              <table:covered-table-cell/>
            </table:table-row>
            <table:table-row table:style-name="Table1.1">
              <table:table-cell table:style-name="Table1.A2" office:value-type="string">
                <text:p text:style-name="P3"><text:span text:style-name="T11">অ ⇐ _</text:span><text:span text:style-name="T12"/></text:p>
              </table:table-cell>
              <table:table-cell table:style-name="Table1.A2" office:value-type="string">
                <text:p text:style-name="P3">o ⇔ of<text:span text:style-name="T10"/></text:p>
              </table:table-cell>
            </table:table-row>
            <table:table-row table:style-name="Table1.1">
              <table:table-cell table:style-name="Table1.A3" office:value-type="string">
                <text:p text:style-name="P4">আ ⇔ া<text:span text:style-name="T13"/></text:p>
              </table:table-cell>
              <table:table-cell table:style-name="Table1.B3" office:value-type="string">
                <text:p text:style-name="P4">a ⇔ a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অ্যা ⇔ ্যা</text:span><text:span text:style-name="T12"/></text:p>
              </table:table-cell>
              <table:table-cell table:style-name="Table1.A2" office:value-type="string">
                <text:p text:style-name="P3">ae ⇔ aef<text:span text:style-name="T10"/></text:p>
              </table:table-cell>
            </table:table-row>
            <table:table-row table:style-name="Table1.1">
              <table:table-cell table:style-name="Table1.A5" office:value-type="string">
                <text:p text:style-name="P4">ই ⇔ ি<text:span text:style-name="T13"/></text:p>
              </table:table-cell>
              <table:table-cell table:style-name="Table1.B5" office:value-type="string">
                <text:p text:style-name="P4">i ⇔ i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ঈ ⇔ ী</text:span><text:span text:style-name="T12"/></text:p>
              </table:table-cell>
              <table:table-cell table:style-name="Table1.A2" office:value-type="string">
                <text:p text:style-name="P3">ii ⇔ iif<text:span text:style-name="T10"/></text:p>
              </table:table-cell>
            </table:table-row>
            <table:table-row table:style-name="Table1.1">
              <table:table-cell table:style-name="Table1.A7" office:value-type="string">
                <text:p text:style-name="P4">উ ⇔ ু<text:span text:style-name="T13"/></text:p>
              </table:table-cell>
              <table:table-cell table:style-name="Table1.B7" office:value-type="string">
                <text:p text:style-name="P4">u ⇔ 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ঊ ⇔ ূ</text:span><text:span text:style-name="T12"/></text:p>
              </table:table-cell>
              <table:table-cell table:style-name="Table1.A2" office:value-type="string">
                <text:p text:style-name="P3">uu ⇔ uuf<text:span text:style-name="T10"/></text:p>
              </table:table-cell>
            </table:table-row>
            <table:table-row table:style-name="Table1.1">
              <table:table-cell table:style-name="Table1.A9" office:value-type="string">
                <text:p text:style-name="P4">ঋ ⇔ ৃ<text:span text:style-name="T13"/></text:p>
              </table:table-cell>
              <table:table-cell table:style-name="Table1.B9" office:value-type="string">
                <text:p text:style-name="P4">q ⇔ q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এ ⇔ ে</text:span><text:span text:style-name="T12"/></text:p>
              </table:table-cell>
              <table:table-cell table:style-name="Table1.A2" office:value-type="string">
                <text:p text:style-name="P3">e ⇔ ef<text:span text:style-name="T10"/></text:p>
              </table:table-cell>
            </table:table-row>
            <table:table-row table:style-name="Table1.1">
              <table:table-cell table:style-name="Table1.A11" office:value-type="string">
                <text:p text:style-name="P4">ও ⇔ ো<text:span text:style-name="T13"/></text:p>
              </table:table-cell>
              <table:table-cell table:style-name="Table1.B11" office:value-type="string">
                <text:p text:style-name="P4">w ⇔ w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ঐ ⇔ ৈ ⇒ োই</text:span><text:span text:style-name="T12"/></text:p>
              </table:table-cell>
              <table:table-cell table:style-name="Table1.A2" office:value-type="string">
                <text:p text:style-name="P3">wi ⇔ wif<text:span text:style-name="T10"/></text:p>
              </table:table-cell>
            </table:table-row>
            <table:table-row table:style-name="Table1.1">
              <table:table-cell table:style-name="Table1.A13" office:value-type="string">
                <text:p text:style-name="P4">ঔ ⇔ ৌ ⇒ োউ<text:span text:style-name="T13"/></text:p>
              </table:table-cell>
              <table:table-cell table:style-name="Table1.B13" office:value-type="string">
                <text:p text:style-name="P4">wu ⇔ w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া ⇔ োয়া</text:span><text:span text:style-name="T12"/></text:p>
              </table:table-cell>
              <table:table-cell table:style-name="Table1.A2" office:value-type="string">
                <text:p text:style-name="P3">wa ⇔ waf<text:span text:style-name="T10"/></text:p>
              </table:table-cell>
            </table:table-row>
            <table:table-row table:style-name="Table1.1">
              <table:table-cell table:style-name="Table1.A15" office:value-type="string">
                <text:p text:style-name="P4">ওয়ে ⇔ োয়ে<text:span text:style-name="T13"/></text:p>
              </table:table-cell>
              <table:table-cell table:style-name="Table1.B15" office:value-type="string">
                <text:p text:style-name="P4">we ⇔ we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্যা </text:span><text:span text:style-name="T12"/></text:p>
              </table:table-cell>
              <table:table-cell table:style-name="Table1.A2" office:value-type="string">
                <text:p text:style-name="P3">wae<text:span text:style-name="T10"/></text:p>
              </table:table-cell>
            </table:table-row>
          </table:table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/></text:p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table:number-columns-spanned="2" office:value-type="string">
                <text:p text:style-name="P6">ব্যঞ্জন</text:p>
              </table:table-cell>
              <table:covered-table-cell/>
            </table:table-row>
            <table:table-row table:style-name="Table2.1">
              <table:table-cell table:style-name="Table2.A2" office:value-type="string">
                <text:p text:style-name="P4">ক</text:p>
              </table:table-cell>
              <table:table-cell table:style-name="Table2.A2" office:value-type="string">
                <text:p text:style-name="P4">k</text:p>
              </table:table-cell>
            </table:table-row>
            <table:table-row table:style-name="Table2.1">
              <table:table-cell table:style-name="Table2.A3" office:value-type="string">
                <text:p text:style-name="P4">খ</text:p>
              </table:table-cell>
              <table:table-cell table:style-name="Table2.B3" office:value-type="string">
                <text:p text:style-name="P4">kh</text:p>
              </table:table-cell>
            </table:table-row>
            <table:table-row table:style-name="Table2.1">
              <table:table-cell table:style-name="Table2.A2" office:value-type="string">
                <text:p text:style-name="P4">গ</text:p>
              </table:table-cell>
              <table:table-cell table:style-name="Table2.A2" office:value-type="string">
                <text:p text:style-name="P4">g</text:p>
              </table:table-cell>
            </table:table-row>
            <table:table-row table:style-name="Table2.1">
              <table:table-cell table:style-name="Table2.A5" office:value-type="string">
                <text:p text:style-name="P4">ঘ</text:p>
              </table:table-cell>
              <table:table-cell table:style-name="Table2.B5" office:value-type="string">
                <text:p text:style-name="P4">gh</text:p>
              </table:table-cell>
            </table:table-row>
            <table:table-row table:style-name="Table2.1">
              <table:table-cell table:style-name="Table2.A2" office:value-type="string">
                <text:p text:style-name="P4">ঙ</text:p>
              </table:table-cell>
              <table:table-cell table:style-name="Table2.A2" office:value-type="string">
                <text:p text:style-name="P4">ng</text:p>
              </table:table-cell>
            </table:table-row>
            <table:table-row table:style-name="Table2.1">
              <table:table-cell table:style-name="Table2.A7" office:value-type="string">
                <text:p text:style-name="P4">চ</text:p>
              </table:table-cell>
              <table:table-cell table:style-name="Table2.B7" office:value-type="string">
                <text:p text:style-name="P4">c</text:p>
              </table:table-cell>
            </table:table-row>
            <table:table-row table:style-name="Table2.1">
              <table:table-cell table:style-name="Table2.A2" office:value-type="string">
                <text:p text:style-name="P4">ছ</text:p>
              </table:table-cell>
              <table:table-cell table:style-name="Table2.A2" office:value-type="string">
                <text:p text:style-name="P4">ch</text:p>
              </table:table-cell>
            </table:table-row>
            <table:table-row table:style-name="Table2.1">
              <table:table-cell table:style-name="Table2.A9" office:value-type="string">
                <text:p text:style-name="P4">জ</text:p>
              </table:table-cell>
              <table:table-cell table:style-name="Table2.B9" office:value-type="string">
                <text:p text:style-name="P4">j</text:p>
              </table:table-cell>
            </table:table-row>
            <table:table-row table:style-name="Table2.1">
              <table:table-cell table:style-name="Table2.A2" office:value-type="string">
                <text:p text:style-name="P4">ঝ</text:p>
              </table:table-cell>
              <table:table-cell table:style-name="Table2.A2" office:value-type="string">
                <text:p text:style-name="P4">jh</text:p>
              </table:table-cell>
            </table:table-row>
            <table:table-row table:style-name="Table2.1">
              <table:table-cell table:style-name="Table2.A11" office:value-type="string">
                <text:p text:style-name="P4">ঞ</text:p>
              </table:table-cell>
              <table:table-cell table:style-name="Table2.B11" office:value-type="string">
                <text:p text:style-name="P4">n<text:span text:style-name="T14">(ব্য.)</text:span></text:p>
                <text:p text:style-name="P4">nff</text:p>
              </table:table-cell>
            </table:table-row>
            <table:table-row table:style-name="Table2.1">
              <table:table-cell table:style-name="Table2.A2" office:value-type="string">
                <text:p text:style-name="P4">ত</text:p>
              </table:table-cell>
              <table:table-cell table:style-name="Table2.A2" office:value-type="string">
                <text:p text:style-name="P4">t</text:p>
              </table:table-cell>
            </table:table-row>
            <table:table-row table:style-name="Table2.1">
              <table:table-cell table:style-name="Table2.A13" office:value-type="string">
                <text:p text:style-name="P4">থ</text:p>
              </table:table-cell>
              <table:table-cell table:style-name="Table2.B13" office:value-type="string">
                <text:p text:style-name="P4">th</text:p>
              </table:table-cell>
            </table:table-row>
            <table:table-row table:style-name="Table2.1">
              <table:table-cell table:style-name="Table2.A2" office:value-type="string">
                <text:p text:style-name="P4">দ</text:p>
              </table:table-cell>
              <table:table-cell table:style-name="Table2.A2" office:value-type="string">
                <text:p text:style-name="P4">d</text:p>
              </table:table-cell>
            </table:table-row>
            <table:table-row table:style-name="Table2.1">
              <table:table-cell table:style-name="Table2.A15" office:value-type="string">
                <text:p text:style-name="P4">ধ</text:p>
              </table:table-cell>
              <table:table-cell table:style-name="Table2.B15" office:value-type="string">
                <text:p text:style-name="P4">dh</text:p>
              </table:table-cell>
            </table:table-row>
            <table:table-row table:style-name="Table2.1">
              <table:table-cell table:style-name="Table2.A2" office:value-type="string">
                <text:p text:style-name="P4">ন</text:p>
              </table:table-cell>
              <table:table-cell table:style-name="Table2.A2" office:value-type="string">
                <text:p text:style-name="P4">n</text:p>
              </table:table-cell>
            </table:table-row>
            <table:table-row table:style-name="Table2.1">
              <table:table-cell table:style-name="Table2.A17" office:value-type="string">
                <text:p text:style-name="P4">ট</text:p>
              </table:table-cell>
              <table:table-cell table:style-name="Table2.B17" office:value-type="string">
                <text:p text:style-name="P4">tf</text:p>
              </table:table-cell>
            </table:table-row>
            <table:table-row table:style-name="Table2.1">
              <table:table-cell table:style-name="Table2.A2" office:value-type="string">
                <text:p text:style-name="P4">ঠ</text:p>
              </table:table-cell>
              <table:table-cell table:style-name="Table2.A2" office:value-type="string">
                <text:p text:style-name="P4">tff</text:p>
              </table:table-cell>
            </table:table-row>
            <table:table-row table:style-name="Table2.1">
              <table:table-cell table:style-name="Table2.A19" office:value-type="string">
                <text:p text:style-name="P4">ড</text:p>
              </table:table-cell>
              <table:table-cell table:style-name="Table2.B19" office:value-type="string">
                <text:p text:style-name="P4">df</text:p>
              </table:table-cell>
            </table:table-row>
            <table:table-row table:style-name="Table2.1">
              <table:table-cell table:style-name="Table2.A20" office:value-type="string">
                <text:p text:style-name="P4">ঢ</text:p>
              </table:table-cell>
              <table:table-cell table:style-name="Table2.A2" office:value-type="string">
                <text:p text:style-name="P4">dff</text:p>
              </table:table-cell>
            </table:table-row>
            <table:table-row table:style-name="Table2.1">
              <table:table-cell table:style-name="Table2.A21" office:value-type="string">
                <text:p text:style-name="P4">ণ</text:p>
              </table:table-cell>
              <table:table-cell table:style-name="Table2.B21" office:value-type="string">
                <text:p text:style-name="P7">Nf</text:p>
              </table:table-cell>
            </table:table-row>
          </table:table>
          <text:p text:style-name="P8"><text:s/></text:p>
          <table:table table:name="Table7" table:style-name="Table7">
            <table:table-column table:style-name="Table7.A"/>
            <table:table-column table:style-name="Table7.B"/>
            <table:table-row table:style-name="Table7.1">
              <table:table-cell table:style-name="Table7.A1" office:value-type="string">
                <text:p text:style-name="P4">প</text:p>
              </table:table-cell>
              <table:table-cell table:style-name="Table7.A1" office:value-type="string">
                <text:p text:style-name="P4">p</text:p>
              </table:table-cell>
            </table:table-row>
            <table:table-row table:style-name="Table7.1">
              <table:table-cell table:style-name="Table7.A2" office:value-type="string">
                <text:p text:style-name="P4">ফ</text:p>
              </table:table-cell>
              <table:table-cell table:style-name="Table7.B2" office:value-type="string">
                <text:p text:style-name="P4">ph</text:p>
              </table:table-cell>
            </table:table-row>
            <table:table-row table:style-name="Table7.1">
              <table:table-cell table:style-name="Table7.A1" office:value-type="string">
                <text:p text:style-name="P4">ব</text:p>
              </table:table-cell>
              <table:table-cell table:style-name="Table7.A1" office:value-type="string">
                <text:p text:style-name="P4">b</text:p>
              </table:table-cell>
            </table:table-row>
            <table:table-row table:style-name="Table7.1">
              <table:table-cell table:style-name="Table7.A4" office:value-type="string">
                <text:p text:style-name="P4">ভ</text:p>
              </table:table-cell>
              <table:table-cell table:style-name="Table7.B4" office:value-type="string">
                <text:p text:style-name="P4">v</text:p>
              </table:table-cell>
            </table:table-row>
            <table:table-row table:style-name="Table7.1">
              <table:table-cell table:style-name="Table7.A1" office:value-type="string">
                <text:p text:style-name="P4">ম</text:p>
              </table:table-cell>
              <table:table-cell table:style-name="Table7.A1" office:value-type="string">
                <text:p text:style-name="P4">m</text:p>
              </table:table-cell>
            </table:table-row>
            <table:table-row table:style-name="Table7.1">
              <table:table-cell table:style-name="Table7.A6" office:value-type="string">
                <text:p text:style-name="P4">য</text:p>
              </table:table-cell>
              <table:table-cell table:style-name="Table7.B6" office:value-type="string">
                <text:p text:style-name="P4">z</text:p>
              </table:table-cell>
            </table:table-row>
            <table:table-row table:style-name="Table7.1">
              <table:table-cell table:style-name="Table7.A1" office:value-type="string">
                <text:p text:style-name="P4">র</text:p>
              </table:table-cell>
              <table:table-cell table:style-name="Table7.A1" office:value-type="string">
                <text:p text:style-name="P4">r</text:p>
              </table:table-cell>
            </table:table-row>
            <table:table-row table:style-name="Table7.1">
              <table:table-cell table:style-name="Table7.A8" office:value-type="string">
                <text:p text:style-name="P4">ল</text:p>
              </table:table-cell>
              <table:table-cell table:style-name="Table7.B8" office:value-type="string">
                <text:p text:style-name="P4">l</text:p>
              </table:table-cell>
            </table:table-row>
            <table:table-row table:style-name="Table7.1">
              <table:table-cell table:style-name="Table7.A1" office:value-type="string">
                <text:p text:style-name="P4">স</text:p>
              </table:table-cell>
              <table:table-cell table:style-name="Table7.A1" office:value-type="string">
                <text:p text:style-name="P4">s</text:p>
              </table:table-cell>
            </table:table-row>
            <table:table-row table:style-name="Table7.1">
              <table:table-cell table:style-name="Table7.A10" office:value-type="string">
                <text:p text:style-name="P4">শ</text:p>
              </table:table-cell>
              <table:table-cell table:style-name="Table7.B10" office:value-type="string">
                <text:p text:style-name="P4">sh</text:p>
              </table:table-cell>
            </table:table-row>
            <table:table-row table:style-name="Table7.1">
              <table:table-cell table:style-name="Table7.A1" office:value-type="string">
                <text:p text:style-name="P4">ষ</text:p>
              </table:table-cell>
              <table:table-cell table:style-name="Table7.A1" office:value-type="string">
                <text:p text:style-name="P4">sf</text:p>
              </table:table-cell>
            </table:table-row>
            <table:table-row table:style-name="Table7.1">
              <table:table-cell table:style-name="Table7.A12" office:value-type="string">
                <text:p text:style-name="P4">হ</text:p>
              </table:table-cell>
              <table:table-cell table:style-name="Table7.B12" office:value-type="string">
                <text:p text:style-name="P4">h</text:p>
              </table:table-cell>
            </table:table-row>
            <table:table-row table:style-name="Table7.1">
              <table:table-cell table:style-name="Table7.A1" office:value-type="string">
                <text:p text:style-name="P4">য়</text:p>
              </table:table-cell>
              <table:table-cell table:style-name="Table7.A1" office:value-type="string">
                <text:p text:style-name="P4">y</text:p>
              </table:table-cell>
            </table:table-row>
            <table:table-row table:style-name="Table7.1">
              <table:table-cell table:style-name="Table7.A14" office:value-type="string">
                <text:p text:style-name="P4">ড়</text:p>
              </table:table-cell>
              <table:table-cell table:style-name="Table7.B14" office:value-type="string">
                <text:p text:style-name="P4">rf</text:p>
              </table:table-cell>
            </table:table-row>
            <table:table-row table:style-name="Table7.1">
              <table:table-cell table:style-name="Table7.A1" office:value-type="string">
                <text:p text:style-name="P4">ঢ়</text:p>
              </table:table-cell>
              <table:table-cell table:style-name="Table7.A1" office:value-type="string">
                <text:p text:style-name="P4">rff</text:p>
              </table:table-cell>
            </table:table-row>
            <table:table-row table:style-name="Table7.1">
              <table:table-cell table:style-name="Table7.A16" office:value-type="string">
                <text:p text:style-name="P4">ৎ</text:p>
              </table:table-cell>
              <table:table-cell table:style-name="Table7.B16" office:value-type="string">
                <text:p text:style-name="P4">t/</text:p>
              </table:table-cell>
            </table:table-row>
            <table:table-row table:style-name="Table7.1">
              <table:table-cell table:style-name="Table7.A1" office:value-type="string">
                <text:p text:style-name="P4">ং</text:p>
              </table:table-cell>
              <table:table-cell table:style-name="Table7.A1" office:value-type="string">
                <text:p text:style-name="P4">x</text:p>
              </table:table-cell>
            </table:table-row>
            <table:table-row table:style-name="Table7.1">
              <table:table-cell table:style-name="Table7.A18" office:value-type="string">
                <text:p text:style-name="P4">ঃ</text:p>
              </table:table-cell>
              <table:table-cell table:style-name="Table7.B18" office:value-type="string">
                <text:p text:style-name="P4">oo</text:p>
              </table:table-cell>
            </table:table-row>
            <table:table-row table:style-name="Table7.1">
              <table:table-cell table:style-name="Table7.A1" office:value-type="string">
                <text:p text:style-name="P4">ঁ ⇔ /</text:p>
              </table:table-cell>
              <table:table-cell table:style-name="Table7.A1" office:value-type="string">
                <text:p text:style-name="P4"><text:span text:style-name="T14">(স্ব.)</text:span>/ ⇔ //</text:p>
              </table:table-cell>
            </table:table-row>
            <table:table-row table:style-name="Table7.1">
              <table:table-cell table:style-name="Table7.A20" office:value-type="string">
                <text:p text:style-name="P4">় <text:span text:style-name="T15">(নুকতা)</text:span></text:p>
              </table:table-cell>
              <table:table-cell table:style-name="Table7.B20" office:value-type="string">
                <text:p text:style-name="P4">,,</text:p>
              </table:table-cell>
            </table:table-row>
          </table:table>
          <text:p text:style-name="P9"><text:span text:style-name="T12"/></text:p>
          <text:p text:style-name="P10"><text:span text:style-name="T10"/></text:p>
          <table:table table:name="Table3" table:style-name="Table3">
            <table:table-column table:style-name="Table3.A"/>
            <table:table-column table:style-name="Table3.B"/>
            <table:table-row table:style-name="Table3.1">
              <table:table-cell table:style-name="Table3.A1" table:number-columns-spanned="2" office:value-type="string">
                <text:p text:style-name="P6">বিরাম ও গাণিতিক চিহ্ন<text:span text:style-name="T16"/></text:p>
              </table:table-cell>
              <table:covered-table-cell/>
            </table:table-row>
            <table:table-row table:style-name="Table3.1">
              <table:table-cell table:style-name="Table3.A2" office:value-type="string">
                <text:p text:style-name="P4">। <text:span text:style-name="T15">(দাঁড়ি)</text:span><text:span text:style-name="T13"/></text:p>
              </table:table-cell>
              <table:table-cell table:style-name="Table3.A2" office:value-type="string">
                <text:p text:style-name="P4">.<text:span text:style-name="T13"/></text:p>
              </table:table-cell>
            </table:table-row>
            <table:table-row table:style-name="Table3.1">
              <table:table-cell table:style-name="Table3.A3" office:value-type="string">
                <text:p text:style-name="P4">. <text:span text:style-name="T15">(ডট)</text:span><text:span text:style-name="T13"/></text:p>
              </table:table-cell>
              <table:table-cell table:style-name="Table3.B3" office:value-type="string">
                <text:p text:style-name="P4">..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4">॥ <text:span text:style-name="T15">(দ্বিদণ্ড)</text:span><text:span text:style-name="T13"/></text:p>
              </table:table-cell>
              <table:table-cell table:style-name="Table3.A2" office:value-type="string">
                <text:p text:style-name="P4">.f<text:span text:style-name="T13"/></text:p>
              </table:table-cell>
            </table:table-row>
            <table:table-row table:style-name="Table3.1">
              <table:table-cell table:style-name="Table3.A5" office:value-type="string">
                <text:p text:style-name="P4">৳ <text:span text:style-name="T15">(টাকা)</text:span><text:span text:style-name="T13"/></text:p>
              </table:table-cell>
              <table:table-cell table:style-name="Table3.B5" office:value-type="string">
                <text:p text:style-name="P4">$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4">₹ <text:span text:style-name="T15">(রুপি)</text:span><text:span text:style-name="T13"/></text:p>
              </table:table-cell>
              <table:table-cell table:style-name="Table3.A2" office:value-type="string">
                <text:p text:style-name="P4">$f<text:span text:style-name="T13"/></text:p>
              </table:table-cell>
            </table:table-row>
            <table:table-row table:style-name="Table3.1">
              <table:table-cell table:style-name="Table3.A7" office:value-type="string">
                <text:p text:style-name="P4">×<text:span text:style-name="T13"/></text:p>
              </table:table-cell>
              <table:table-cell table:style-name="Table3.B7" office:value-type="string">
                <text:p text:style-name="P4">+f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4">÷<text:span text:style-name="T13"/></text:p>
              </table:table-cell>
              <table:table-cell table:style-name="Table3.A2" office:value-type="string">
                <text:p text:style-name="P4">-f<text:span text:style-name="T13"/></text:p>
              </table:table-cell>
            </table:table-row>
          </table:table>
          <text:p text:style-name="P5"><text:span text:style-name="T12"/></text:p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table:number-columns-spanned="2" office:value-type="string">
                <text:p text:style-name="P6">ফলা ও বিশেষ চিহ্ন<text:span text:style-name="T16"/></text:p>
              </table:table-cell>
              <table:covered-table-cell/>
            </table:table-row>
            <table:table-row table:style-name="Table4.2">
              <table:table-cell table:style-name="Table4.A2" office:value-type="string">
                <text:p text:style-name="P4">্য <text:span text:style-name="T15">(য-ফলা)</text:span><text:span text:style-name="T13"/></text:p>
              </table:table-cell>
              <table:table-cell table:style-name="Table4.A2" office:value-type="string">
                <text:p text:style-name="P4"><text:span text:style-name="T14">(ব্য.)</text:span>z</text:p>
                <text:p text:style-name="P4">zf<text:span text:style-name="T13"/></text:p>
              </table:table-cell>
            </table:table-row>
            <table:table-row table:style-name="Table4.1">
              <table:table-cell table:style-name="Table4.A3" office:value-type="string">
                <text:p text:style-name="P4">র্◌ <text:span text:style-name="T15">(রেফ)</text:span><text:span text:style-name="T13"/></text:p>
              </table:table-cell>
              <table:table-cell table:style-name="Table4.B3" office:value-type="string">
                <text:p text:style-name="P4">rr<text:span text:style-name="T14">(ব্য.)</text:span>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4">্র <text:span text:style-name="T15">(র-ফলা)</text:span><text:span text:style-name="T13"/></text:p>
              </table:table-cell>
              <table:table-cell table:style-name="Table4.A2" office:value-type="string">
                <text:p text:style-name="P4"><text:span text:style-name="T14">(ব্য.)</text:span>r</text:p>
              </table:table-cell>
            </table:table-row>
            <table:table-row table:style-name="Table4.1">
              <table:table-cell table:style-name="Table4.A5" office:value-type="string">
                <text:p text:style-name="P4">্ <text:span text:style-name="T15">(হসন্ত)</text:span><text:span text:style-name="T13"/></text:p>
              </table:table-cell>
              <table:table-cell table:style-name="Table4.B5" office:value-type="string">
                <text:p text:style-name="P4">qq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4">্‌ <text:span text:style-name="T15">(বিযুক্ত হসন্ত)</text:span><text:span text:style-name="T13"/></text:p>
              </table:table-cell>
              <table:table-cell table:style-name="Table4.A2" office:value-type="string">
                <text:p text:style-name="P4">xx<text:span text:style-name="T13"/></text:p>
              </table:table-cell>
            </table:table-row>
            <table:table-row table:style-name="Table4.1">
              <table:table-cell table:style-name="Table4.A7" office:value-type="string">
                <text:p text:style-name="P4"><text:span text:style-name="T17">[zwnj]</text:span><text:span text:style-name="T13"/></text:p>
              </table:table-cell>
              <table:table-cell table:style-name="Table4.B7" office:value-type="string">
                <text:p text:style-name="P4">``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4"><text:span text:style-name="T17">[zwj]</text:span><text:span text:style-name="T13"/></text:p>
              </table:table-cell>
              <table:table-cell table:style-name="Table4.A2" office:value-type="string">
                <text:p text:style-name="P4">``f<text:span text:style-name="T13"/></text:p>
              </table:table-cell>
            </table:table-row>
            <table:table-row table:style-name="Table4.2">
              <table:table-cell table:style-name="Table4.A9" office:value-type="string">
                <text:p text:style-name="P4">ঽ <text:span text:style-name="T15">(অবগ্রহ)</text:span><text:span text:style-name="T13"/></text:p>
              </table:table-cell>
              <table:table-cell table:style-name="Table4.B9" office:value-type="string">
                <text:p text:style-name="P4">of<text:span text:style-name="T13"/></text:p>
                <text:p text:style-name="P4"><text:span text:style-name="T14">(ব্য.)</text:span>off</text:p>
              </table:table-cell>
            </table:table-row>
            <table:table-row table:style-name="Table4.1">
              <table:table-cell table:style-name="Table4.A2" office:value-type="string">
                <text:p text:style-name="P4">৺ <text:span text:style-name="T15">(ঈশ্বর চিহ্ন)</text:span><text:span text:style-name="T13"/></text:p>
              </table:table-cell>
              <table:table-cell table:style-name="Table4.A2" office:value-type="string">
                <text:p text:style-name="P4">.ff<text:span text:style-name="T13"/></text:p>
              </table:table-cell>
            </table:table-row>
          </table:table>
          <text:p text:style-name="P11"><text:span text:style-name="T10"/></text:p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table:number-columns-spanned="2" office:value-type="string">
                <text:p text:style-name="P6">যুক্তবর্ণ ও উদাহরণ<text:span text:style-name="T16"/></text:p>
              </table:table-cell>
              <table:covered-table-cell/>
            </table:table-row>
            <table:table-row table:style-name="Table5.1">
              <table:table-cell table:style-name="Table5.A2" office:value-type="string">
                <text:p text:style-name="P4">ক্ষ<text:span text:style-name="T13"/></text:p>
              </table:table-cell>
              <table:table-cell table:style-name="Table5.A2" office:value-type="string">
                <text:p text:style-name="P4">kf<text:span text:style-name="T13"/></text:p>
                <text:p text:style-name="P4">kkh<text:span text:style-name="T13"/></text:p>
                <text:p text:style-name="P4">ksf<text:span text:style-name="T13"/></text:p>
              </table:table-cell>
            </table:table-row>
            <table:table-row table:style-name="Table5.1">
              <table:table-cell table:style-name="Table5.A3" office:value-type="string">
                <text:p text:style-name="P4">জ্ঞ<text:span text:style-name="T13"/></text:p>
              </table:table-cell>
              <table:table-cell table:style-name="Table5.B3" office:value-type="string">
                <text:p text:style-name="P4">gg<text:span text:style-name="T13"/></text:p>
                <text:p text:style-name="P4">jnff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4">গ্‌গ<text:span text:style-name="T13"/></text:p>
              </table:table-cell>
              <table:table-cell table:style-name="Table5.A2" office:value-type="string">
                <text:p text:style-name="P4">ggg<text:span text:style-name="T13"/></text:p>
              </table:table-cell>
            </table:table-row>
            <table:table-row table:style-name="Table5.1">
              <table:table-cell table:style-name="Table5.A5" office:value-type="string">
                <text:p text:style-name="P4">ঙ্গ<text:span text:style-name="T13"/></text:p>
              </table:table-cell>
              <table:table-cell table:style-name="Table5.B5" office:value-type="string">
                <text:p text:style-name="P4">ngg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4">ট্ট<text:span text:style-name="T13"/></text:p>
              </table:table-cell>
              <table:table-cell table:style-name="Table5.A2" office:value-type="string">
                <text:p text:style-name="P4">ttf<text:span text:style-name="T13"/></text:p>
                <text:p text:style-name="P4">tftf<text:span text:style-name="T13"/></text:p>
              </table:table-cell>
            </table:table-row>
            <table:table-row table:style-name="Table5.1">
              <table:table-cell table:style-name="Table5.A7" office:value-type="string">
                <text:p text:style-name="P4">ড্ড<text:span text:style-name="T13"/></text:p>
              </table:table-cell>
              <table:table-cell table:style-name="Table5.B7" office:value-type="string">
                <text:p text:style-name="P4">ddf<text:span text:style-name="T13"/></text:p>
                <text:p text:style-name="P4">dfdf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4">ণ্ণ<text:span text:style-name="T13"/></text:p>
              </table:table-cell>
              <table:table-cell table:style-name="Table5.A2" office:value-type="string">
                <text:p text:style-name="P4">nnf<text:span text:style-name="T13"/></text:p>
                <text:p text:style-name="P4">nfn<text:span text:style-name="T13"/></text:p>
                <text:p text:style-name="P4">nfnf<text:span text:style-name="T13"/></text:p>
              </table:table-cell>
            </table:table-row>
            <table:table-row table:style-name="Table5.1">
              <table:table-cell table:style-name="Table5.A9" office:value-type="string">
                <text:p text:style-name="P4">তঁ<text:span text:style-name="T13"/></text:p>
              </table:table-cell>
              <table:table-cell table:style-name="Table5.B9" office:value-type="string">
                <text:p text:style-name="P4">to/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4">তাঁ<text:span text:style-name="T13"/></text:p>
              </table:table-cell>
              <table:table-cell table:style-name="Table5.A2" office:value-type="string">
                <text:p text:style-name="P4">ta/<text:span text:style-name="T13"/></text:p>
              </table:table-cell>
            </table:table-row>
          </table:table>
          <text:p text:style-name="P9"><text:span text:style-name="T18"><text:s/></text:span><text:span text:style-name="T12"/></text:p>
          <table:table table:name="Table6" table:style-name="Table6">
            <table:table-column table:style-name="Table6.A"/>
            <table:table-column table:style-name="Table6.B"/>
            <table:table-row table:style-name="Table6.1">
              <table:table-cell table:style-name="Table6.A1" table:number-columns-spanned="2" office:value-type="string">
                <text:p text:style-name="P2">মডিফায়ার<text:span text:style-name="T10"/></text:p>
              </table:table-cell>
              <table:covered-table-cell/>
            </table:table-row>
            <table:table-row table:style-name="Table6.1">
              <table:table-cell table:style-name="Table6.A2" office:value-type="string">
                <text:p text:style-name="P3"><text:span text:style-name="T19">পৃথায়ক</text:span><text:span text:style-name="T11"> ⇔ ;</text:span></text:p>
              </table:table-cell>
              <table:table-cell table:style-name="Table6.A2" office:value-type="string">
                <text:p text:style-name="P3">; ⇔ ;;<text:span text:style-name="T10"/></text:p>
              </table:table-cell>
            </table:table-row>
            <table:table-row table:style-name="Table6.1">
              <table:table-cell table:style-name="Table6.A3" office:value-type="string">
                <text:p text:style-name="P3"><text:span text:style-name="T19">স্লাইসার</text:span><text:span text:style-name="T11"> ⇔ /</text:span></text:p>
              </table:table-cell>
              <table:table-cell table:style-name="Table6.B3" office:value-type="string">
                <text:p text:style-name="P3"><text:span text:style-name="T14">(যু.ব্য.)</text:span>/ ⇔ //</text:p>
              </table:table-cell>
            </table:table-row>
          </table:table>
          <text:p text:style-name="P12"><text:span text:style-name="T10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July" svg:font-family="July"/>
    <style:font-face style:name="Kalpurush" svg:font-family="Kalpurush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 style:parent-style-name="Normal">
      <style:text-properties fo:color="#000000" loext:opacity="100%" style:font-name="July" fo:font-family="July" fo:font-size="12pt" fo:language="en" fo:country="GB" style:font-name-complex="July" style:font-family-complex="July" style:font-size-complex="12pt" style:language-complex="bn" style:country-complex="BD"/>
    </style:style>
    <style:style style:name="Normal" style:family="paragraph"/>
    <style:style style:name="Heading" style:family="paragraph" style:parent-style-name="Standard" style:class="chapter">
      <style:paragraph-properties fo:margin-top="0.1665in" fo:margin-bottom="0.0835in" style:contextual-spacing="false"/>
      <style:text-properties style:font-name="July" fo:font-family="July" fo:font-size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0.25in" fo:margin-bottom="0.0555in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Normal" style:class="chapter">
      <style:paragraph-properties fo:margin-top="0.111in" fo:margin-bottom="0.0555in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Normal" style:class="chapter">
      <style:paragraph-properties fo:margin-top="0.111in" fo:margin-bottom="0.0555in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Normal" style:class="chapter">
      <style:paragraph-properties fo:margin-top="0.0555in" fo:margin-bottom="0.028in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0.0555in" fo:margin-bottom="0.028in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028in" fo:margin-bottom="0in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028in" fo:margin-bottom="0in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false" fo:line-height="100%"/>
      <style:text-properties style:font-name="Arial" fo:font-family="Arial" fo:font-size="28pt" fo:letter-spacing="-0.0071in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0102in" style:font-size-complex="14pt"/>
    </style:style>
    <style:style style:name="Quote" style:family="paragraph" style:parent-style-name="Normal">
      <style:paragraph-properties fo:margin-top="0.111in" fo:margin-bottom="0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 style:parent-style-name="Normal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List" style:family="paragraph" style:parent-style-name="Text_20_body" style:class="list">
      <style:text-properties style:font-name="July" fo:font-family="July" style:font-name-complex="July" style:font-family-complex="July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style:font-name="July" fo:font-family="July" fo:font-size="12pt" fo:font-style="italic" style:font-name-complex="July" style:font-family-complex="July" style:font-size-complex="12pt"/>
    </style:style>
    <style:style style:name="Index" style:family="paragraph" style:parent-style-name="Standard" style:class="index">
      <style:text-properties style:font-name="July" fo:font-family="July" style:font-name-complex="July" style:font-family-complex="July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70e089b17412e4cb7773e41413306b17a2328c34</meta:generator>
    <meta:creation-date>2026-05-05T12:44:12Z</meta:creation-date>
    <dc:date>2026-05-26T18:43:48.942717209</dc:date>
    <meta:editing-duration>PT16M34S</meta:editing-duration>
    <meta:editing-cycles>5</meta:editing-cycles>
    <meta:document-statistic meta:table-count="7" meta:image-count="0" meta:object-count="0" meta:page-count="1" meta:paragraph-count="183" meta:word-count="278" meta:character-count="618" meta:non-whitespace-character-count="519"/>
  </office:meta>
</office:document-meta>
</file>