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etBrains Mono" svg:font-family="'JetBrains Mono'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automatic-styles>
    <style:style style:name="Table1" style:family="table">
      <style:table-properties style:width="53.96mm" table:align="left"/>
    </style:style>
    <style:style style:name="Table1.A" style:family="table-column">
      <style:table-column-properties style:column-width="26.97mm"/>
    </style:style>
    <style:style style:name="Table1.B" style:family="table-column">
      <style:table-column-properties style:column-width="26.99mm"/>
    </style:style>
    <style:style style:name="Table1.1" style:family="table-row">
      <style:table-row-properties style:min-row-height="8.13mm"/>
    </style:style>
    <style:style style:name="Table1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1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" style:family="table">
      <style:table-properties style:width="49.28mm" fo:margin-left="5.36mm" table:align="left"/>
    </style:style>
    <style:style style:name="Table2.A" style:family="table-column">
      <style:table-column-properties style:column-width="23.87mm"/>
    </style:style>
    <style:style style:name="Table2.B" style:family="table-column">
      <style:table-column-properties style:column-width="25.42mm"/>
    </style:style>
    <style:style style:name="Table2.1" style:family="table-row">
      <style:table-row-properties style:min-row-height="8.13mm"/>
    </style:style>
    <style:style style:name="Table2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2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20" style:family="table-cell">
      <style:table-cell-properties style:vertical-align="middle" fo:background-color="#f2dcdc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2.A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2.B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7" style:family="table">
      <style:table-properties style:width="44.71mm" fo:margin-left="5.36mm" table:align="left"/>
    </style:style>
    <style:style style:name="Table7.A" style:family="table-column">
      <style:table-column-properties style:column-width="17.73mm"/>
    </style:style>
    <style:style style:name="Table7.B" style:family="table-column">
      <style:table-column-properties style:column-width="26.99mm"/>
    </style:style>
    <style:style style:name="Table7.1" style:family="table-row">
      <style:table-row-properties style:min-row-height="8.13mm"/>
    </style:style>
    <style:style style:name="Table7.A1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7.A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2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0" style:family="table-cell">
      <style:table-cell-properties style:vertical-align="middle" fo:padding-left="1.91mm" fo:padding-right="1.91mm" fo:padding-top="0mm" fo:padding-bottom="0mm" fo:border="0.5pt solid #000000"/>
    </style:style>
    <style:style style:name="Table3" style:family="table">
      <style:table-properties style:width="49.28mm" fo:margin-left="-0.02mm" table:align="left"/>
    </style:style>
    <style:style style:name="Table3.A" style:family="table-column">
      <style:table-column-properties style:column-width="25.42mm"/>
    </style:style>
    <style:style style:name="Table3.B" style:family="table-column">
      <style:table-column-properties style:column-width="23.87mm"/>
    </style:style>
    <style:style style:name="Table3.1" style:family="table-row">
      <style:table-row-properties style:min-row-height="8.13mm"/>
    </style:style>
    <style:style style:name="Table3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3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" style:family="table">
      <style:table-properties style:width="49.55mm" table:align="left"/>
    </style:style>
    <style:style style:name="Table4.A" style:family="table-column">
      <style:table-column-properties style:column-width="25.42mm"/>
    </style:style>
    <style:style style:name="Table4.B" style:family="table-column">
      <style:table-column-properties style:column-width="24.13mm"/>
    </style:style>
    <style:style style:name="Table4.1" style:family="table-row">
      <style:table-row-properties style:min-row-height="8.13mm"/>
    </style:style>
    <style:style style:name="Table4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4.2" style:family="table-row">
      <style:table-row-properties style:min-row-height="16.62mm"/>
    </style:style>
    <style:style style:name="Table4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4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5" style:family="table">
      <style:table-properties style:width="54.15mm" table:align="left"/>
    </style:style>
    <style:style style:name="Table5.A" style:family="table-column">
      <style:table-column-properties style:column-width="27.29mm"/>
    </style:style>
    <style:style style:name="Table5.B" style:family="table-column">
      <style:table-column-properties style:column-width="26.86mm"/>
    </style:style>
    <style:style style:name="Table5.1" style:family="table-row">
      <style:table-row-properties style:min-row-height="8.13mm"/>
    </style:style>
    <style:style style:name="Table5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5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6" style:family="table">
      <style:table-properties style:width="54.15mm" table:align="left"/>
    </style:style>
    <style:style style:name="Table6.A" style:family="table-column">
      <style:table-column-properties style:column-width="21.68mm"/>
    </style:style>
    <style:style style:name="Table6.B" style:family="table-column">
      <style:table-column-properties style:column-width="32.47mm"/>
    </style:style>
    <style:style style:name="Table6.1" style:family="table-row">
      <style:table-row-properties style:min-row-height="8.13mm"/>
    </style:style>
    <style:style style:name="Table6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6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6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8" style:family="table">
      <style:table-properties style:width="54.1mm" table:align="left"/>
    </style:style>
    <style:style style:name="Table8.A" style:family="table-column">
      <style:table-column-properties style:column-width="16.58mm"/>
    </style:style>
    <style:style style:name="Table8.B" style:family="table-column">
      <style:table-column-properties style:column-width="37.52mm"/>
    </style:style>
    <style:style style:name="Table8.1" style:family="table-row">
      <style:table-row-properties style:min-row-height="8.13mm"/>
    </style:style>
    <style:style style:name="Table8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8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8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8.B3" style:family="table-cell">
      <style:table-cell-properties style:vertical-align="middle" fo:padding-left="1.91mm" fo:padding-right="1.91mm" fo:padding-top="0mm" fo:padding-bottom="0mm" fo:border="0.5pt solid #000000"/>
    </style:style>
    <style:style style:name="P1" style:family="paragraph" style:parent-style-name="Standard" style:master-page-name="Standard">
      <style:paragraph-properties fo:margin-top="0mm" fo:margin-bottom="0mm" style:contextual-spacing="false" fo:text-align="center" style:justify-single-word="false" style:page-number="auto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style:font-size-asian="10pt" style:font-name-complex="Noto Serif Bengali" style:font-size-complex="10pt" style:language-complex="bn" style:country-complex="BD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JetBrains Mono" fo:font-size="10pt" fo:language="en" fo:country="GB" style:font-size-asian="10pt" style:font-name-complex="Noto Serif Bengali" style:font-size-complex="10pt" style:language-complex="bn" style:country-complex="BD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7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cff52" style:font-size-asian="10pt" style:font-name-complex="Noto Serif Bengali" style:font-size-complex="10pt" style:language-complex="bn" style:country-complex="BD"/>
    </style:style>
    <style:style style:name="P8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JetBrains Mono" style:font-size-complex="10pt" style:language-complex="bn" style:country-complex="BD"/>
    </style:style>
    <style:style style:name="P11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officeooo:paragraph-rsid="001537cc" style:font-size-asian="10pt" style:font-name-complex="JetBrains Mono" style:font-size-complex="10pt" style:language-complex="bn" style:country-complex="BD"/>
    </style:style>
    <style:style style:name="P12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1537cc" style:font-size-asian="10pt" style:font-name-complex="Noto Serif Bengali" style:font-size-complex="10pt" style:language-complex="bn" style:country-complex="BD"/>
    </style:style>
    <style:style style:name="P13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4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5" style:family="paragraph" style:parent-style-name="Standard">
      <style:paragraph-properties fo:margin-top="0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cd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7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8" style:family="paragraph" style:parent-style-name="Table_20_Contents">
      <style:paragraph-properties fo:margin-top="0.4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9" style:family="paragraph" style:parent-style-name="Standard">
      <style:paragraph-properties fo:margin-top="0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US" fo:font-weight="bold" style:font-size-asian="10pt" style:font-name-complex="Noto Serif Bengali" style:font-size-complex="10pt" style:language-complex="bn" style:country-complex="BD"/>
    </style:style>
    <style:style style:name="P20" style:family="paragraph" style:parent-style-name="Table_20_Contents">
      <style:paragraph-properties fo:margin-top="0.49mm" fo:margin-bottom="0mm" style:contextual-spacing="false" fo:text-align="center" style:justify-single-word="false"/>
      <style:text-properties fo:color="#000000" loext:opacity="100%" style:font-name="JetBrains Mono" fo:font-size="10pt" fo:language="en" fo:country="GB" style:font-size-asian="10pt" style:font-name-complex="JetBrains Mono" style:font-size-complex="10pt" style:language-complex="bn" style:country-complex="BD"/>
    </style:style>
    <style:style style:name="P21" style:family="paragraph" style:parent-style-name="Standard">
      <style:paragraph-properties fo:margin-top="0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2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weight-asian="bold" style:font-name-complex="Noto Serif Bengali" style:font-size-complex="10pt" style:language-complex="bn" style:country-complex="BD" style:font-weight-complex="bold"/>
    </style:style>
    <style:style style:name="P2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name-complex="Noto Serif Bengali" style:font-size-complex="10pt" style:language-complex="bn" style:country-complex="BD"/>
    </style:style>
    <style:style style:name="P24" style:family="paragraph" style:parent-style-name="Table_20_Contents">
      <style:paragraph-properties fo:margin-top="0mm" fo:margin-bottom="0mm" style:contextual-spacing="false" fo:text-align="center" style:justify-single-word="false"/>
      <style:text-properties fo:color="#000000" loext:opacity="100%" style:font-name="JetBrains Mono" fo:font-size="10pt" fo:language="en" fo:country="GB" officeooo:rsid="0020dcf4" officeooo:paragraph-rsid="0020dcf4" style:font-size-asian="10pt" style:font-name-complex="Dark Courier" style:font-size-complex="10pt" style:language-complex="bn" style:country-complex="BD"/>
    </style:style>
    <style:style style:name="P25" style:family="paragraph" style:parent-style-name="Standard">
      <style:paragraph-properties fo:margin-top="1.99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officeooo:paragraph-rsid="0020dcf4" style:font-size-asian="10pt" style:font-name-complex="Noto Serif Bengali" style:font-size-complex="10pt" style:language-complex="bn" style:country-complex="BD"/>
    </style:style>
    <style:style style:name="T10" style:family="text">
      <style:text-properties fo:color="#000000" loext:opacity="100%" fo:language="en" fo:country="GB" style:language-complex="bn" style:country-complex="BD"/>
    </style:style>
    <style:style style:name="T11" style:family="text">
      <style:text-properties fo:font-weight="bold"/>
    </style:style>
    <style:style style:name="T12" style:family="text">
      <style:text-properties fo:color="#000000" loext:opacity="100%" fo:language="en" fo:country="GB" fo:font-weight="bold" style:language-complex="bn" style:country-complex="BD"/>
    </style:style>
    <style:style style:name="T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style:language-complex="bn" style:country-complex="BD"/>
    </style:style>
    <style:style style:name="T14" style:family="text">
      <style:text-properties fo:color="#ff0000" loext:opacity="100%"/>
    </style:style>
    <style:style style:name="T15" style:family="text">
      <style:text-properties fo:color="#808080" loext:opacity="100%"/>
    </style:style>
    <style:style style:name="T16" style:family="text">
      <style:text-properties fo:color="#000000" loext:opacity="100%" style:text-line-through-style="none" style:text-line-through-type="none" fo:language="en" fo:country="GB" fo:font-style="normal" style:text-underline-style="none" style:language-complex="bn" style:country-complex="BD"/>
    </style:style>
    <style:style style:name="T17" style:family="text">
      <style:text-properties fo:color="#0000cd" loext:opacity="100%"/>
    </style:style>
    <style:style style:name="T18" style:family="text">
      <style:text-properties fo:color="#00008b" loext:opacity="100%" fo:font-weight="bold"/>
    </style:style>
    <style:style style:name="T19" style:family="text">
      <style:text-properties fo:language="en" fo:country="US"/>
    </style:style>
    <style:style style:name="T20" style:family="text">
      <style:text-properties officeooo:rsid="002607d4"/>
    </style:style>
    <style:style style:name="T21" style:family="text">
      <style:text-properties officeooo:rsid="00218092"/>
    </style:style>
    <style:style style:name="Sect1" style:family="section">
      <style:section-properties text:dont-balance-text-columns="true" style:editable="false">
        <style:columns fo:column-count="5">
          <style:column style:rel-width="17405*" fo:start-indent="0mm" fo:end-indent="1.68mm"/>
          <style:column style:rel-width="10322*" fo:start-indent="1.68mm" fo:end-indent="1.62mm"/>
          <style:column style:rel-width="12966*" fo:start-indent="1.62mm" fo:end-indent="1.66mm"/>
          <style:column style:rel-width="11915*" fo:start-indent="1.66mm" fo:end-indent="1.62mm"/>
          <style:column style:rel-width="12322*" fo:start-indent="1.62mm" fo:end-indent="1.53mm"/>
        </style:columns>
      </style:section-properties>
    </style:style>
    <style:style style:name="Sect2" style:family="section">
      <style:section-properties style:editable="false">
        <style:columns fo:column-count="5" fo:column-gap="0mm"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section text:style-name="Sect2" text:name="Section1">
          <text:p text:style-name="P1"><text:span text:style-name="T10"/></text:p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table:number-columns-spanned="2" office:value-type="string">
                <text:p text:style-name="P2">স্বর<text:span text:style-name="T10"/></text:p>
              </table:table-cell>
              <table:covered-table-cell/>
            </table:table-row>
            <table:table-row table:style-name="Table1.1">
              <table:table-cell table:style-name="Table1.A2" office:value-type="string">
                <text:p text:style-name="P3"><text:span text:style-name="T11">অ ⇐ _</text:span><text:span text:style-name="T12"/></text:p>
              </table:table-cell>
              <table:table-cell table:style-name="Table1.A2" office:value-type="string">
                <text:p text:style-name="P4">o ⇔ of<text:span text:style-name="T10"/></text:p>
              </table:table-cell>
            </table:table-row>
            <table:table-row table:style-name="Table1.1">
              <table:table-cell table:style-name="Table1.A3" office:value-type="string">
                <text:p text:style-name="P5">আ ⇔ া<text:span text:style-name="T13"/></text:p>
              </table:table-cell>
              <table:table-cell table:style-name="Table1.B3" office:value-type="string">
                <text:p text:style-name="P6">a ⇔ a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অ্যা ⇔ ্যা</text:span><text:span text:style-name="T12"/></text:p>
              </table:table-cell>
              <table:table-cell table:style-name="Table1.A2" office:value-type="string">
                <text:p text:style-name="P4">ae ⇔ aef<text:span text:style-name="T10"/></text:p>
              </table:table-cell>
            </table:table-row>
            <table:table-row table:style-name="Table1.1">
              <table:table-cell table:style-name="Table1.A5" office:value-type="string">
                <text:p text:style-name="P5">ই ⇔ ি<text:span text:style-name="T13"/></text:p>
              </table:table-cell>
              <table:table-cell table:style-name="Table1.B5" office:value-type="string">
                <text:p text:style-name="P6">i ⇔ i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7">ঈ ⇔ ী ⇒ িই</text:p>
              </table:table-cell>
              <table:table-cell table:style-name="Table1.A2" office:value-type="string">
                <text:p text:style-name="P4">ii ⇔ iif<text:span text:style-name="T10"/></text:p>
              </table:table-cell>
            </table:table-row>
            <table:table-row table:style-name="Table1.1">
              <table:table-cell table:style-name="Table1.A7" office:value-type="string">
                <text:p text:style-name="P5">উ ⇔ ু<text:span text:style-name="T13"/></text:p>
              </table:table-cell>
              <table:table-cell table:style-name="Table1.B7" office:value-type="string">
                <text:p text:style-name="P6">u ⇔ 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ঊ ⇔ ূ</text:span><text:span text:style-name="T12"/></text:p>
              </table:table-cell>
              <table:table-cell table:style-name="Table1.A2" office:value-type="string">
                <text:p text:style-name="P4">uu ⇔ uuf<text:span text:style-name="T10"/></text:p>
              </table:table-cell>
            </table:table-row>
            <table:table-row table:style-name="Table1.1">
              <table:table-cell table:style-name="Table1.A9" office:value-type="string">
                <text:p text:style-name="P5">ঋ ⇔ ৃ<text:span text:style-name="T13"/></text:p>
              </table:table-cell>
              <table:table-cell table:style-name="Table1.B9" office:value-type="string">
                <text:p text:style-name="P6">q ⇔ q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এ ⇔ ে</text:span><text:span text:style-name="T12"/></text:p>
              </table:table-cell>
              <table:table-cell table:style-name="Table1.A2" office:value-type="string">
                <text:p text:style-name="P4">e ⇔ ef<text:span text:style-name="T10"/></text:p>
              </table:table-cell>
            </table:table-row>
            <table:table-row table:style-name="Table1.1">
              <table:table-cell table:style-name="Table1.A11" office:value-type="string">
                <text:p text:style-name="P5">ও ⇔ ো<text:span text:style-name="T13"/></text:p>
              </table:table-cell>
              <table:table-cell table:style-name="Table1.B11" office:value-type="string">
                <text:p text:style-name="P6">w ⇔ w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ঐ ⇔ ৈ ⇒ োই</text:span><text:span text:style-name="T12"/></text:p>
              </table:table-cell>
              <table:table-cell table:style-name="Table1.A2" office:value-type="string">
                <text:p text:style-name="P4">wi ⇔ wif<text:span text:style-name="T10"/></text:p>
              </table:table-cell>
            </table:table-row>
            <table:table-row table:style-name="Table1.1">
              <table:table-cell table:style-name="Table1.A13" office:value-type="string">
                <text:p text:style-name="P5">ঔ ⇔ ৌ ⇒ োউ<text:span text:style-name="T13"/></text:p>
              </table:table-cell>
              <table:table-cell table:style-name="Table1.B13" office:value-type="string">
                <text:p text:style-name="P6">wu ⇔ w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া ⇔ োয়া</text:span><text:span text:style-name="T12"/></text:p>
              </table:table-cell>
              <table:table-cell table:style-name="Table1.A2" office:value-type="string">
                <text:p text:style-name="P4">wa ⇔ waf<text:span text:style-name="T10"/></text:p>
              </table:table-cell>
            </table:table-row>
            <table:table-row table:style-name="Table1.1">
              <table:table-cell table:style-name="Table1.A15" office:value-type="string">
                <text:p text:style-name="P5">ওয়ে ⇔ োয়ে<text:span text:style-name="T13"/></text:p>
              </table:table-cell>
              <table:table-cell table:style-name="Table1.B15" office:value-type="string">
                <text:p text:style-name="P6">we ⇔ we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্যা </text:span><text:span text:style-name="T12"/></text:p>
              </table:table-cell>
              <table:table-cell table:style-name="Table1.A2" office:value-type="string">
                <text:p text:style-name="P4">wae<text:span text:style-name="T10"/></text:p>
              </table:table-cell>
            </table:table-row>
          </table:table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/></text:p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table:number-columns-spanned="2" office:value-type="string">
                <text:p text:style-name="P9">ব্যঞ্জন</text:p>
              </table:table-cell>
              <table:covered-table-cell/>
            </table:table-row>
            <table:table-row table:style-name="Table2.1">
              <table:table-cell table:style-name="Table2.A2" office:value-type="string">
                <text:p text:style-name="P5">ক</text:p>
              </table:table-cell>
              <table:table-cell table:style-name="Table2.A2" office:value-type="string">
                <text:p text:style-name="P10">k</text:p>
              </table:table-cell>
            </table:table-row>
            <table:table-row table:style-name="Table2.1">
              <table:table-cell table:style-name="Table2.A3" office:value-type="string">
                <text:p text:style-name="P5">খ</text:p>
              </table:table-cell>
              <table:table-cell table:style-name="Table2.B3" office:value-type="string">
                <text:p text:style-name="P10">kh</text:p>
              </table:table-cell>
            </table:table-row>
            <table:table-row table:style-name="Table2.1">
              <table:table-cell table:style-name="Table2.A2" office:value-type="string">
                <text:p text:style-name="P5">গ</text:p>
              </table:table-cell>
              <table:table-cell table:style-name="Table2.A2" office:value-type="string">
                <text:p text:style-name="P10">g</text:p>
              </table:table-cell>
            </table:table-row>
            <table:table-row table:style-name="Table2.1">
              <table:table-cell table:style-name="Table2.A5" office:value-type="string">
                <text:p text:style-name="P5">ঘ</text:p>
              </table:table-cell>
              <table:table-cell table:style-name="Table2.B5" office:value-type="string">
                <text:p text:style-name="P10">gh</text:p>
              </table:table-cell>
            </table:table-row>
            <table:table-row table:style-name="Table2.1">
              <table:table-cell table:style-name="Table2.A2" office:value-type="string">
                <text:p text:style-name="P5">ঙ</text:p>
              </table:table-cell>
              <table:table-cell table:style-name="Table2.A2" office:value-type="string">
                <text:p text:style-name="P10">ng</text:p>
              </table:table-cell>
            </table:table-row>
            <table:table-row table:style-name="Table2.1">
              <table:table-cell table:style-name="Table2.A7" office:value-type="string">
                <text:p text:style-name="P5">চ</text:p>
              </table:table-cell>
              <table:table-cell table:style-name="Table2.B7" office:value-type="string">
                <text:p text:style-name="P10">c</text:p>
              </table:table-cell>
            </table:table-row>
            <table:table-row table:style-name="Table2.1">
              <table:table-cell table:style-name="Table2.A2" office:value-type="string">
                <text:p text:style-name="P5">ছ</text:p>
              </table:table-cell>
              <table:table-cell table:style-name="Table2.A2" office:value-type="string">
                <text:p text:style-name="P10">ch</text:p>
              </table:table-cell>
            </table:table-row>
            <table:table-row table:style-name="Table2.1">
              <table:table-cell table:style-name="Table2.A9" office:value-type="string">
                <text:p text:style-name="P5">জ</text:p>
              </table:table-cell>
              <table:table-cell table:style-name="Table2.B9" office:value-type="string">
                <text:p text:style-name="P10">j</text:p>
              </table:table-cell>
            </table:table-row>
            <table:table-row table:style-name="Table2.1">
              <table:table-cell table:style-name="Table2.A2" office:value-type="string">
                <text:p text:style-name="P5">ঝ</text:p>
              </table:table-cell>
              <table:table-cell table:style-name="Table2.A2" office:value-type="string">
                <text:p text:style-name="P10">jh</text:p>
              </table:table-cell>
            </table:table-row>
            <table:table-row table:style-name="Table2.1">
              <table:table-cell table:style-name="Table2.A11" office:value-type="string">
                <text:p text:style-name="P5">ঞ</text:p>
              </table:table-cell>
              <table:table-cell table:style-name="Table2.B11" office:value-type="string">
                <text:p text:style-name="P10">n<text:span text:style-name="T14">(ব্য.)<text:line-break/></text:span>nff</text:p>
              </table:table-cell>
            </table:table-row>
            <table:table-row table:style-name="Table2.1">
              <table:table-cell table:style-name="Table2.A2" office:value-type="string">
                <text:p text:style-name="P5">ত</text:p>
              </table:table-cell>
              <table:table-cell table:style-name="Table2.A2" office:value-type="string">
                <text:p text:style-name="P10">t</text:p>
              </table:table-cell>
            </table:table-row>
            <table:table-row table:style-name="Table2.1">
              <table:table-cell table:style-name="Table2.A13" office:value-type="string">
                <text:p text:style-name="P5">থ</text:p>
              </table:table-cell>
              <table:table-cell table:style-name="Table2.B13" office:value-type="string">
                <text:p text:style-name="P10">th</text:p>
              </table:table-cell>
            </table:table-row>
            <table:table-row table:style-name="Table2.1">
              <table:table-cell table:style-name="Table2.A2" office:value-type="string">
                <text:p text:style-name="P5">দ</text:p>
              </table:table-cell>
              <table:table-cell table:style-name="Table2.A2" office:value-type="string">
                <text:p text:style-name="P10">d</text:p>
              </table:table-cell>
            </table:table-row>
            <table:table-row table:style-name="Table2.1">
              <table:table-cell table:style-name="Table2.A15" office:value-type="string">
                <text:p text:style-name="P5">ধ</text:p>
              </table:table-cell>
              <table:table-cell table:style-name="Table2.B15" office:value-type="string">
                <text:p text:style-name="P10">dh</text:p>
              </table:table-cell>
            </table:table-row>
            <table:table-row table:style-name="Table2.1">
              <table:table-cell table:style-name="Table2.A2" office:value-type="string">
                <text:p text:style-name="P5">ন</text:p>
              </table:table-cell>
              <table:table-cell table:style-name="Table2.A2" office:value-type="string">
                <text:p text:style-name="P10">n</text:p>
              </table:table-cell>
            </table:table-row>
            <table:table-row table:style-name="Table2.1">
              <table:table-cell table:style-name="Table2.A17" office:value-type="string">
                <text:p text:style-name="P5">ট</text:p>
              </table:table-cell>
              <table:table-cell table:style-name="Table2.B17" office:value-type="string">
                <text:p text:style-name="P10">tf</text:p>
              </table:table-cell>
            </table:table-row>
            <table:table-row table:style-name="Table2.1">
              <table:table-cell table:style-name="Table2.A2" office:value-type="string">
                <text:p text:style-name="P5">ঠ</text:p>
              </table:table-cell>
              <table:table-cell table:style-name="Table2.A2" office:value-type="string">
                <text:p text:style-name="P10">tff</text:p>
              </table:table-cell>
            </table:table-row>
            <table:table-row table:style-name="Table2.1">
              <table:table-cell table:style-name="Table2.A19" office:value-type="string">
                <text:p text:style-name="P5">ড</text:p>
              </table:table-cell>
              <table:table-cell table:style-name="Table2.B19" office:value-type="string">
                <text:p text:style-name="P10">df</text:p>
              </table:table-cell>
            </table:table-row>
            <table:table-row table:style-name="Table2.1">
              <table:table-cell table:style-name="Table2.A20" office:value-type="string">
                <text:p text:style-name="P5">ঢ</text:p>
              </table:table-cell>
              <table:table-cell table:style-name="Table2.A2" office:value-type="string">
                <text:p text:style-name="P10">dff</text:p>
              </table:table-cell>
            </table:table-row>
            <table:table-row table:style-name="Table2.1">
              <table:table-cell table:style-name="Table2.A21" office:value-type="string">
                <text:p text:style-name="P5">ণ</text:p>
              </table:table-cell>
              <table:table-cell table:style-name="Table2.B21" office:value-type="string">
                <text:p text:style-name="P11">nf</text:p>
              </table:table-cell>
            </table:table-row>
          </table:table>
          <text:p text:style-name="P12"><text:s/></text:p>
          <table:table table:name="Table7" table:style-name="Table7">
            <table:table-column table:style-name="Table7.A"/>
            <table:table-column table:style-name="Table7.B"/>
            <table:table-row table:style-name="Table7.1">
              <table:table-cell table:style-name="Table7.A1" office:value-type="string">
                <text:p text:style-name="P5">প</text:p>
              </table:table-cell>
              <table:table-cell table:style-name="Table7.A1" office:value-type="string">
                <text:p text:style-name="P10">p</text:p>
              </table:table-cell>
            </table:table-row>
            <table:table-row table:style-name="Table7.1">
              <table:table-cell table:style-name="Table7.A2" office:value-type="string">
                <text:p text:style-name="P5">ফ</text:p>
              </table:table-cell>
              <table:table-cell table:style-name="Table7.B2" office:value-type="string">
                <text:p text:style-name="P10">ph</text:p>
              </table:table-cell>
            </table:table-row>
            <table:table-row table:style-name="Table7.1">
              <table:table-cell table:style-name="Table7.A1" office:value-type="string">
                <text:p text:style-name="P5">ব</text:p>
              </table:table-cell>
              <table:table-cell table:style-name="Table7.A1" office:value-type="string">
                <text:p text:style-name="P10">b</text:p>
              </table:table-cell>
            </table:table-row>
            <table:table-row table:style-name="Table7.1">
              <table:table-cell table:style-name="Table7.A4" office:value-type="string">
                <text:p text:style-name="P5">ভ</text:p>
              </table:table-cell>
              <table:table-cell table:style-name="Table7.B4" office:value-type="string">
                <text:p text:style-name="P10">v</text:p>
              </table:table-cell>
            </table:table-row>
            <table:table-row table:style-name="Table7.1">
              <table:table-cell table:style-name="Table7.A1" office:value-type="string">
                <text:p text:style-name="P5">ম</text:p>
              </table:table-cell>
              <table:table-cell table:style-name="Table7.A1" office:value-type="string">
                <text:p text:style-name="P10">m</text:p>
              </table:table-cell>
            </table:table-row>
            <table:table-row table:style-name="Table7.1">
              <table:table-cell table:style-name="Table7.A6" office:value-type="string">
                <text:p text:style-name="P5">য</text:p>
              </table:table-cell>
              <table:table-cell table:style-name="Table7.B6" office:value-type="string">
                <text:p text:style-name="P10">z</text:p>
              </table:table-cell>
            </table:table-row>
            <table:table-row table:style-name="Table7.1">
              <table:table-cell table:style-name="Table7.A1" office:value-type="string">
                <text:p text:style-name="P5">র</text:p>
              </table:table-cell>
              <table:table-cell table:style-name="Table7.A1" office:value-type="string">
                <text:p text:style-name="P10">r</text:p>
              </table:table-cell>
            </table:table-row>
            <table:table-row table:style-name="Table7.1">
              <table:table-cell table:style-name="Table7.A8" office:value-type="string">
                <text:p text:style-name="P5">ল</text:p>
              </table:table-cell>
              <table:table-cell table:style-name="Table7.B8" office:value-type="string">
                <text:p text:style-name="P10">l</text:p>
              </table:table-cell>
            </table:table-row>
            <table:table-row table:style-name="Table7.1">
              <table:table-cell table:style-name="Table7.A1" office:value-type="string">
                <text:p text:style-name="P5">স</text:p>
              </table:table-cell>
              <table:table-cell table:style-name="Table7.A1" office:value-type="string">
                <text:p text:style-name="P10">s</text:p>
              </table:table-cell>
            </table:table-row>
            <table:table-row table:style-name="Table7.1">
              <table:table-cell table:style-name="Table7.A10" office:value-type="string">
                <text:p text:style-name="P5">শ</text:p>
              </table:table-cell>
              <table:table-cell table:style-name="Table7.B10" office:value-type="string">
                <text:p text:style-name="P10">sh</text:p>
              </table:table-cell>
            </table:table-row>
            <table:table-row table:style-name="Table7.1">
              <table:table-cell table:style-name="Table7.A1" office:value-type="string">
                <text:p text:style-name="P5">ষ</text:p>
              </table:table-cell>
              <table:table-cell table:style-name="Table7.A1" office:value-type="string">
                <text:p text:style-name="P10">sf</text:p>
              </table:table-cell>
            </table:table-row>
            <table:table-row table:style-name="Table7.1">
              <table:table-cell table:style-name="Table7.A12" office:value-type="string">
                <text:p text:style-name="P5">হ</text:p>
              </table:table-cell>
              <table:table-cell table:style-name="Table7.B12" office:value-type="string">
                <text:p text:style-name="P10">h</text:p>
              </table:table-cell>
            </table:table-row>
            <table:table-row table:style-name="Table7.1">
              <table:table-cell table:style-name="Table7.A1" office:value-type="string">
                <text:p text:style-name="P5">য়</text:p>
              </table:table-cell>
              <table:table-cell table:style-name="Table7.A1" office:value-type="string">
                <text:p text:style-name="P10">y</text:p>
              </table:table-cell>
            </table:table-row>
            <table:table-row table:style-name="Table7.1">
              <table:table-cell table:style-name="Table7.A14" office:value-type="string">
                <text:p text:style-name="P5">ড়</text:p>
              </table:table-cell>
              <table:table-cell table:style-name="Table7.B14" office:value-type="string">
                <text:p text:style-name="P10">rf</text:p>
              </table:table-cell>
            </table:table-row>
            <table:table-row table:style-name="Table7.1">
              <table:table-cell table:style-name="Table7.A1" office:value-type="string">
                <text:p text:style-name="P5">ঢ়</text:p>
              </table:table-cell>
              <table:table-cell table:style-name="Table7.A1" office:value-type="string">
                <text:p text:style-name="P10">rff</text:p>
              </table:table-cell>
            </table:table-row>
            <table:table-row table:style-name="Table7.1">
              <table:table-cell table:style-name="Table7.A16" office:value-type="string">
                <text:p text:style-name="P5">ৎ</text:p>
              </table:table-cell>
              <table:table-cell table:style-name="Table7.B16" office:value-type="string">
                <text:p text:style-name="P10">t/</text:p>
              </table:table-cell>
            </table:table-row>
            <table:table-row table:style-name="Table7.1">
              <table:table-cell table:style-name="Table7.A1" office:value-type="string">
                <text:p text:style-name="P5">ং</text:p>
              </table:table-cell>
              <table:table-cell table:style-name="Table7.A1" office:value-type="string">
                <text:p text:style-name="P10">x</text:p>
              </table:table-cell>
            </table:table-row>
            <table:table-row table:style-name="Table7.1">
              <table:table-cell table:style-name="Table7.A18" office:value-type="string">
                <text:p text:style-name="P5">ঃ</text:p>
              </table:table-cell>
              <table:table-cell table:style-name="Table7.B18" office:value-type="string">
                <text:p text:style-name="P10">oo</text:p>
              </table:table-cell>
            </table:table-row>
            <table:table-row table:style-name="Table7.1">
              <table:table-cell table:style-name="Table7.A1" office:value-type="string">
                <text:p text:style-name="P5">ঁ ⇔ /</text:p>
              </table:table-cell>
              <table:table-cell table:style-name="Table7.A1" office:value-type="string">
                <text:p text:style-name="P10"><text:span text:style-name="T14">(স্ব.)</text:span>/ ⇔ //</text:p>
              </table:table-cell>
            </table:table-row>
            <table:table-row table:style-name="Table7.1">
              <table:table-cell table:style-name="Table7.A20" office:value-type="string">
                <text:p text:style-name="P5">় <text:span text:style-name="T15">(নুকতা)</text:span></text:p>
              </table:table-cell>
              <table:table-cell table:style-name="Table7.B20" office:value-type="string">
                <text:p text:style-name="P10">,,</text:p>
              </table:table-cell>
            </table:table-row>
          </table:table>
          <text:p text:style-name="P13"><text:span text:style-name="T12"/></text:p>
          <text:p text:style-name="P14"><text:span text:style-name="T10"/></text:p>
          <table:table table:name="Table3" table:style-name="Table3">
            <table:table-column table:style-name="Table3.A"/>
            <table:table-column table:style-name="Table3.B"/>
            <table:table-row table:style-name="Table3.1">
              <table:table-cell table:style-name="Table3.A1" table:number-columns-spanned="2" office:value-type="string">
                <text:p text:style-name="P9">বিরাম ও গাণিতিক চিহ্ন<text:span text:style-name="T16"/></text:p>
              </table:table-cell>
              <table:covered-table-cell/>
            </table:table-row>
            <table:table-row table:style-name="Table3.1">
              <table:table-cell table:style-name="Table3.A2" office:value-type="string">
                <text:p text:style-name="P5">। <text:span text:style-name="T15">(দাঁড়ি)</text:span><text:span text:style-name="T13"/></text:p>
              </table:table-cell>
              <table:table-cell table:style-name="Table3.A2" office:value-type="string">
                <text:p text:style-name="P6">.<text:span text:style-name="T13"/></text:p>
              </table:table-cell>
            </table:table-row>
            <table:table-row table:style-name="Table3.1">
              <table:table-cell table:style-name="Table3.A3" office:value-type="string">
                <text:p text:style-name="P5">. <text:span text:style-name="T15">(ডট)</text:span><text:span text:style-name="T13"/></text:p>
              </table:table-cell>
              <table:table-cell table:style-name="Table3.B3" office:value-type="string">
                <text:p text:style-name="P6">..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॥ <text:span text:style-name="T15">(দ্বিদণ্ড)</text:span><text:span text:style-name="T13"/></text:p>
              </table:table-cell>
              <table:table-cell table:style-name="Table3.A2" office:value-type="string">
                <text:p text:style-name="P6">.f<text:span text:style-name="T13"/></text:p>
              </table:table-cell>
            </table:table-row>
            <table:table-row table:style-name="Table3.1">
              <table:table-cell table:style-name="Table3.A5" office:value-type="string">
                <text:p text:style-name="P5">৳ <text:span text:style-name="T15">(টাকা)</text:span><text:span text:style-name="T13"/></text:p>
              </table:table-cell>
              <table:table-cell table:style-name="Table3.B5" office:value-type="string">
                <text:p text:style-name="P6">$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₹ <text:span text:style-name="T15">(রুপি)</text:span><text:span text:style-name="T13"/></text:p>
              </table:table-cell>
              <table:table-cell table:style-name="Table3.A2" office:value-type="string">
                <text:p text:style-name="P6">$f<text:span text:style-name="T13"/></text:p>
              </table:table-cell>
            </table:table-row>
            <table:table-row table:style-name="Table3.1">
              <table:table-cell table:style-name="Table3.A7" office:value-type="string">
                <text:p text:style-name="P5">×<text:span text:style-name="T13"/></text:p>
              </table:table-cell>
              <table:table-cell table:style-name="Table3.B7" office:value-type="string">
                <text:p text:style-name="P6">+f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÷<text:span text:style-name="T13"/></text:p>
              </table:table-cell>
              <table:table-cell table:style-name="Table3.A2" office:value-type="string">
                <text:p text:style-name="P6">-f<text:span text:style-name="T13"/></text:p>
              </table:table-cell>
            </table:table-row>
          </table:table>
          <text:p text:style-name="P15"><text:span text:style-name="T12"/></text:p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table:number-columns-spanned="2" office:value-type="string">
                <text:p text:style-name="P9">ফলা ও বিশেষ চিহ্ন<text:span text:style-name="T16"/></text:p>
              </table:table-cell>
              <table:covered-table-cell/>
            </table:table-row>
            <table:table-row table:style-name="Table4.2">
              <table:table-cell table:style-name="Table4.A2" office:value-type="string">
                <text:p text:style-name="P5">্য <text:span text:style-name="T15">(য-ফলা)</text:span><text:span text:style-name="T13"/></text:p>
              </table:table-cell>
              <table:table-cell table:style-name="Table4.A2" office:value-type="string">
                <text:p text:style-name="P10"><text:span text:style-name="T14">(ব্য.)</text:span>z<text:line-break/>zf</text:p>
              </table:table-cell>
            </table:table-row>
            <table:table-row table:style-name="Table4.1">
              <table:table-cell table:style-name="Table4.A3" office:value-type="string">
                <text:p text:style-name="P5">র্◌ <text:span text:style-name="T15">(রেফ)</text:span><text:span text:style-name="T13"/></text:p>
              </table:table-cell>
              <table:table-cell table:style-name="Table4.B3" office:value-type="string">
                <text:p text:style-name="P10">rr<text:span text:style-name="T14">(ব্য.)</text:span>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র <text:span text:style-name="T15">(র-ফলা)</text:span><text:span text:style-name="T13"/></text:p>
              </table:table-cell>
              <table:table-cell table:style-name="Table4.A2" office:value-type="string">
                <text:p text:style-name="P10"><text:span text:style-name="T14">(ব্য.)</text:span>r</text:p>
              </table:table-cell>
            </table:table-row>
            <table:table-row table:style-name="Table4.1">
              <table:table-cell table:style-name="Table4.A5" office:value-type="string">
                <text:p text:style-name="P5">্ <text:span text:style-name="T15">(হসন্ত)</text:span><text:span text:style-name="T13"/></text:p>
              </table:table-cell>
              <table:table-cell table:style-name="Table4.B5" office:value-type="string">
                <text:p text:style-name="P10">qq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‌ <text:span text:style-name="T15">(বিযুক্ত হসন্ত)</text:span><text:span text:style-name="T13"/></text:p>
              </table:table-cell>
              <table:table-cell table:style-name="Table4.A2" office:value-type="string">
                <text:p text:style-name="P10">xx<text:span text:style-name="T13"/></text:p>
              </table:table-cell>
            </table:table-row>
            <table:table-row table:style-name="Table4.1">
              <table:table-cell table:style-name="Table4.A7" office:value-type="string">
                <text:p text:style-name="P16">[zwnj]</text:p>
              </table:table-cell>
              <table:table-cell table:style-name="Table4.B7" office:value-type="string">
                <text:p text:style-name="P10">``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6"><text:span text:style-name="T17">[zwj]</text:span><text:span text:style-name="T13"/></text:p>
              </table:table-cell>
              <table:table-cell table:style-name="Table4.A2" office:value-type="string">
                <text:p text:style-name="P10">``f<text:span text:style-name="T13"/></text:p>
              </table:table-cell>
            </table:table-row>
            <table:table-row table:style-name="Table4.2">
              <table:table-cell table:style-name="Table4.A9" office:value-type="string">
                <text:p text:style-name="P5">ঽ <text:span text:style-name="T15">(অবগ্রহ)</text:span><text:span text:style-name="T13"/></text:p>
              </table:table-cell>
              <table:table-cell table:style-name="Table4.B9" office:value-type="string">
                <text:p text:style-name="P10">of<text:line-break/><text:span text:style-name="T14">(ব্য.)</text:span>off</text:p>
              </table:table-cell>
            </table:table-row>
            <table:table-row table:style-name="Table4.1">
              <table:table-cell table:style-name="Table4.A2" office:value-type="string">
                <text:p text:style-name="P5">৺ <text:span text:style-name="T15">(ঈশ্বর চিহ্ন)</text:span><text:span text:style-name="T13"/></text:p>
              </table:table-cell>
              <table:table-cell table:style-name="Table4.A2" office:value-type="string">
                <text:p text:style-name="P10">.ff<text:span text:style-name="T13"/></text:p>
              </table:table-cell>
            </table:table-row>
          </table:table>
          <text:p text:style-name="P17"/>
          <text:p text:style-name="P17"/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table:number-columns-spanned="2" office:value-type="string">
                <text:p text:style-name="P9">যুক্তবর্ণ ও উদাহরণ<text:span text:style-name="T16"/></text:p>
              </table:table-cell>
              <table:covered-table-cell/>
            </table:table-row>
            <table:table-row table:style-name="Table5.1">
              <table:table-cell table:style-name="Table5.A2" office:value-type="string">
                <text:p text:style-name="P5">ক্ষ<text:span text:style-name="T13"/></text:p>
              </table:table-cell>
              <table:table-cell table:style-name="Table5.A2" office:value-type="string">
                <text:p text:style-name="P18">kf<text:line-break/>kkh<text:line-break/>ksf</text:p>
              </table:table-cell>
            </table:table-row>
            <table:table-row table:style-name="Table5.1">
              <table:table-cell table:style-name="Table5.A3" office:value-type="string">
                <text:p text:style-name="P5">জ্ঞ<text:span text:style-name="T13"/></text:p>
              </table:table-cell>
              <table:table-cell table:style-name="Table5.B3" office:value-type="string">
                <text:p text:style-name="P18">gg<text:line-break/>jnff</text:p>
              </table:table-cell>
            </table:table-row>
            <table:table-row table:style-name="Table5.1">
              <table:table-cell table:style-name="Table5.A2" office:value-type="string">
                <text:p text:style-name="P5">গ্‌গ<text:span text:style-name="T13"/></text:p>
              </table:table-cell>
              <table:table-cell table:style-name="Table5.A2" office:value-type="string">
                <text:p text:style-name="P18">ggg<text:span text:style-name="T13"/></text:p>
              </table:table-cell>
            </table:table-row>
            <table:table-row table:style-name="Table5.1">
              <table:table-cell table:style-name="Table5.A5" office:value-type="string">
                <text:p text:style-name="P5">ঙ্গ<text:span text:style-name="T13"/></text:p>
              </table:table-cell>
              <table:table-cell table:style-name="Table5.B5" office:value-type="string">
                <text:p text:style-name="P18">ngg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ট্ট<text:span text:style-name="T13"/></text:p>
              </table:table-cell>
              <table:table-cell table:style-name="Table5.A2" office:value-type="string">
                <text:p text:style-name="P18">ttf<text:line-break/>tftf</text:p>
              </table:table-cell>
            </table:table-row>
            <table:table-row table:style-name="Table5.1">
              <table:table-cell table:style-name="Table5.A7" office:value-type="string">
                <text:p text:style-name="P5">ড্ড<text:span text:style-name="T13"/></text:p>
              </table:table-cell>
              <table:table-cell table:style-name="Table5.B7" office:value-type="string">
                <text:p text:style-name="P18">ddf<text:line-break/>dfdf</text:p>
              </table:table-cell>
            </table:table-row>
            <table:table-row table:style-name="Table5.1">
              <table:table-cell table:style-name="Table5.A2" office:value-type="string">
                <text:p text:style-name="P5">ণ্ণ<text:span text:style-name="T13"/></text:p>
              </table:table-cell>
              <table:table-cell table:style-name="Table5.A2" office:value-type="string">
                <text:p text:style-name="P18">nnf<text:line-break/>nfn<text:line-break/>nfnf</text:p>
              </table:table-cell>
            </table:table-row>
            <table:table-row table:style-name="Table5.1">
              <table:table-cell table:style-name="Table5.A9" office:value-type="string">
                <text:p text:style-name="P5">তঁ<text:span text:style-name="T13"/></text:p>
              </table:table-cell>
              <table:table-cell table:style-name="Table5.B9" office:value-type="string">
                <text:p text:style-name="P18">to/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তাঁ<text:span text:style-name="T13"/></text:p>
              </table:table-cell>
              <table:table-cell table:style-name="Table5.A2" office:value-type="string">
                <text:p text:style-name="P18">ta/<text:span text:style-name="T13"/></text:p>
              </table:table-cell>
            </table:table-row>
          </table:table>
          <text:p text:style-name="P19"><text:s/></text:p>
          <table:table table:name="Table6" table:style-name="Table6">
            <table:table-column table:style-name="Table6.A"/>
            <table:table-column table:style-name="Table6.B"/>
            <table:table-row table:style-name="Table6.1">
              <table:table-cell table:style-name="Table6.A1" table:number-columns-spanned="2" office:value-type="string">
                <text:p text:style-name="P2">মডিফায়ার<text:span text:style-name="T10"/></text:p>
              </table:table-cell>
              <table:covered-table-cell/>
            </table:table-row>
            <table:table-row table:style-name="Table6.1">
              <table:table-cell table:style-name="Table6.A2" office:value-type="string">
                <text:p text:style-name="P3"><text:span text:style-name="T18">পৃথায়ক</text:span><text:span text:style-name="T11"> ⇔ ;</text:span></text:p>
              </table:table-cell>
              <table:table-cell table:style-name="Table6.A2" office:value-type="string">
                <text:p text:style-name="P20">; ⇔ ;;<text:span text:style-name="T10"/></text:p>
              </table:table-cell>
            </table:table-row>
            <table:table-row table:style-name="Table6.1">
              <table:table-cell table:style-name="Table6.A3" office:value-type="string">
                <text:p text:style-name="P3"><text:span text:style-name="T18">স্লাইসার</text:span><text:span text:style-name="T11"> ⇔ /</text:span></text:p>
              </table:table-cell>
              <table:table-cell table:style-name="Table6.B3" office:value-type="string">
                <text:p text:style-name="P20"><text:span text:style-name="T14">(যু.ব্য.)</text:span>/ ⇔ //</text:p>
              </table:table-cell>
            </table:table-row>
          </table:table>
          <text:p text:style-name="P21"><text:span text:style-name="T19"/></text:p>
          <table:table table:name="Table8" table:style-name="Table8">
            <table:table-column table:style-name="Table8.A"/>
            <table:table-column table:style-name="Table8.B"/>
            <table:table-row table:style-name="Table8.1">
              <table:table-cell table:style-name="Table8.A1" table:number-columns-spanned="2" office:value-type="string">
                <text:p text:style-name="P22">স্বচ্ছরূপ কারচিহ্নের উদাহরণ</text:p>
              </table:table-cell>
              <table:covered-table-cell/>
            </table:table-row>
            <table:table-row table:style-name="Table8.1">
              <table:table-cell table:style-name="Table8.A2" office:value-type="string">
                <text:p text:style-name="P23">শু, রু, হৃ</text:p>
              </table:table-cell>
              <table:table-cell table:style-name="Table8.A2" office:value-type="string">
                <text:p text:style-name="P24">shu, <text:span text:style-name="T20">ru, hq</text:span></text:p>
              </table:table-cell>
            </table:table-row>
            <table:table-row table:style-name="Table8.1">
              <table:table-cell table:style-name="Table8.A3" office:value-type="string">
                <text:p text:style-name="P23">শ‌ু, র‌ু, হ‌ৃ</text:p>
              </table:table-cell>
              <table:table-cell table:style-name="Table8.B3" office:value-type="string">
                <text:p text:style-name="P24">shuff,<text:span text:style-name="T21">ruff,hqff</text:span></text:p>
              </table:table-cell>
            </table:table-row>
          </table:table>
          <text:p text:style-name="P25"><text:span text:style-name="T10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etBrains Mono" svg:font-family="'JetBrains Mono'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2.51mm" style:writing-mode="page"/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July" fo:font-family="July" fo:font-size="12pt" fo:language="en" fo:country="GB" style:font-name-complex="July" style:font-family-complex="July" style:font-size-complex="12pt" style:language-complex="bn" style:country-complex="BD"/>
    </style:style>
    <style:style style:name="Normal" style:family="paragraph"/>
    <style:style style:name="Heading" style:family="paragraph" style:parent-style-name="Standard" style:class="chapter">
      <style:paragraph-properties fo:margin-top="4.23mm" fo:margin-bottom="2.12mm" style:contextual-spacing="false"/>
      <style:text-properties style:font-name="July" fo:font-family="July" fo:font-size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6.35mm" fo:margin-bottom="1.41mm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mm" fo:margin-bottom="1.41mm" style:contextual-spacing="false" fo:line-height="100%"/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26mm" style:font-size-complex="14pt"/>
    </style:style>
    <style:style style:name="Quote" style:family="paragraph" style:parent-style-name="Normal">
      <style:paragraph-properties fo:margin-top="2.82mm" fo:margin-bottom="0m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2.7mm" fo:margin-right="0mm" fo:text-indent="0mm" style:auto-text-indent="false"/>
    </style:style>
    <style:style style:name="Intense_20_Quote" style:display-name="Intense Quote" style:family="paragraph" style:parent-style-name="Normal">
      <style:paragraph-properties fo:margin-left="15.24mm" fo:margin-right="15.24mm" fo:margin-top="6.35mm" fo:margin-bottom="6.35mm" style:contextual-spacing="false" fo:text-align="center" style:justify-single-word="false" fo:text-indent="0mm" style:auto-text-indent="false" fo:padding="0m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mm" fo:margin-bottom="0m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mm" fo:margin-bottom="1.76mm" style:contextual-spacing="false"/>
    </style:style>
    <style:style style:name="toc_20_2" style:display-name="toc 2" style:family="paragraph" style:parent-style-name="Normal">
      <style:paragraph-properties fo:margin-left="3.88mm" fo:margin-right="0mm" fo:margin-top="0mm" fo:margin-bottom="1.76mm" style:contextual-spacing="false" fo:text-indent="0mm" style:auto-text-indent="false"/>
    </style:style>
    <style:style style:name="toc_20_3" style:display-name="toc 3" style:family="paragraph" style:parent-style-name="Normal">
      <style:paragraph-properties fo:margin-left="7.76mm" fo:margin-right="0mm" fo:margin-top="0mm" fo:margin-bottom="1.76mm" style:contextual-spacing="false" fo:text-indent="0mm" style:auto-text-indent="false"/>
    </style:style>
    <style:style style:name="toc_20_4" style:display-name="toc 4" style:family="paragraph" style:parent-style-name="Normal">
      <style:paragraph-properties fo:margin-left="11.64mm" fo:margin-right="0mm" fo:margin-top="0mm" fo:margin-bottom="1.76mm" style:contextual-spacing="false" fo:text-indent="0mm" style:auto-text-indent="false"/>
    </style:style>
    <style:style style:name="toc_20_5" style:display-name="toc 5" style:family="paragraph" style:parent-style-name="Normal">
      <style:paragraph-properties fo:margin-left="15.52mm" fo:margin-right="0mm" fo:margin-top="0mm" fo:margin-bottom="1.76mm" style:contextual-spacing="false" fo:text-indent="0mm" style:auto-text-indent="false"/>
    </style:style>
    <style:style style:name="toc_20_6" style:display-name="toc 6" style:family="paragraph" style:parent-style-name="Normal">
      <style:paragraph-properties fo:margin-left="19.4mm" fo:margin-right="0mm" fo:margin-top="0mm" fo:margin-bottom="1.76mm" style:contextual-spacing="false" fo:text-indent="0mm" style:auto-text-indent="false"/>
    </style:style>
    <style:style style:name="toc_20_7" style:display-name="toc 7" style:family="paragraph" style:parent-style-name="Normal">
      <style:paragraph-properties fo:margin-left="23.28mm" fo:margin-right="0mm" fo:margin-top="0mm" fo:margin-bottom="1.76mm" style:contextual-spacing="false" fo:text-indent="0mm" style:auto-text-indent="false"/>
    </style:style>
    <style:style style:name="toc_20_8" style:display-name="toc 8" style:family="paragraph" style:parent-style-name="Normal">
      <style:paragraph-properties fo:margin-left="27.16mm" fo:margin-right="0mm" fo:margin-top="0mm" fo:margin-bottom="1.76mm" style:contextual-spacing="false" fo:text-indent="0mm" style:auto-text-indent="false"/>
    </style:style>
    <style:style style:name="toc_20_9" style:display-name="toc 9" style:family="paragraph" style:parent-style-name="Normal">
      <style:paragraph-properties fo:margin-left="31.04mm" fo:margin-right="0mm" fo:margin-top="0mm" fo:margin-bottom="1.76mm" style:contextual-spacing="false" fo:text-indent="0mm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mm" fo:margin-bottom="0mm" style:contextual-spacing="false"/>
    </style:style>
    <style:style style:name="List" style:family="paragraph" style:parent-style-name="Text_20_body" style:class="list">
      <style:text-properties style:font-name="July" fo:font-family="July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style:font-name="July" fo:font-family="July" fo:font-size="12pt" fo:font-style="italic" style:font-name-complex="July" style:font-family-complex="July" style:font-size-complex="12pt"/>
    </style:style>
    <style:style style:name="Index" style:family="paragraph" style:parent-style-name="Standard" style:class="index">
      <style:text-properties style:font-name="July" fo:font-family="July" style:font-name-complex="July" style:font-family-complex="July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26m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9m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9m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2.7mm" fo:margin-bottom="12.7mm" fo:margin-left="12.7mm" fo:margin-right="12.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620$Build-2</meta:generator>
    <meta:creation-date>2026-05-05T12:44:12Z</meta:creation-date>
    <dc:date>2026-06-13T15:33:25.865959849</dc:date>
    <meta:editing-duration>PT43M14S</meta:editing-duration>
    <meta:editing-cycles>22</meta:editing-cycles>
    <meta:document-statistic meta:table-count="8" meta:image-count="0" meta:object-count="0" meta:page-count="1" meta:paragraph-count="178" meta:word-count="293" meta:character-count="689" meta:non-whitespace-character-count="570"/>
  </office:meta>
</office:document-meta>
</file>