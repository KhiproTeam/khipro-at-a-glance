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8.96mm"/>
    </style:style>
    <style:style style:name="Table7.B" style:family="table-column">
      <style:table-column-properties style:column-width="25.75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7.29mm"/>
    </style:style>
    <style:style style:name="Table6.B" style:family="table-column">
      <style:table-column-properties style:column-width="26.86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6.35mm"/>
    </style:style>
    <style:style style:name="Table8.B" style:family="table-column">
      <style:table-column-properties style:column-width="37.75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Dark Courier" style:font-size-complex="10pt" style:language-complex="bn" style:country-complex="B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Dark Courier" fo:font-size="10pt" fo:language="en" fo:country="GB" fo:font-style="normal" style:text-underline-style="none" fo:font-weight="normal" officeooo:paragraph-rsid="001537cc" style:font-size-asian="10pt" style:font-name-complex="Dark Courier" style:font-size-complex="10pt" style:language-complex="bn" style:country-complex="BD"/>
    </style:style>
    <style:style style:name="P11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4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Dark Courier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6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7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18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style:font-size-asian="10pt" style:font-name-complex="Dark Courier" style:font-size-complex="10pt" style:language-complex="bn" style:country-complex="BD"/>
    </style:style>
    <style:style style:name="P19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2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Dark Courier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3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ঈ ⇔ ী</text:span><text:span text:style-name="T12"/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8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9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9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9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9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9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9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9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9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9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9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9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9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9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9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9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9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9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9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9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0">nf</text:p>
              </table:table-cell>
            </table:table-row>
          </table:table>
          <text:p text:style-name="P11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9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9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9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9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9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9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9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9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9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9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9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9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9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9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9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9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9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9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9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9">,,</text:p>
              </table:table-cell>
            </table:table-row>
          </table:table>
          <text:p text:style-name="P12"><text:span text:style-name="T12"/></text:p>
          <text:p text:style-name="P13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8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14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8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9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9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9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9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5">[zwnj]</text:p>
              </table:table-cell>
              <table:table-cell table:style-name="Table4.B7" office:value-type="string">
                <text:p text:style-name="P9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6"><text:span text:style-name="T17">[zwj]</text:span><text:span text:style-name="T13"/></text:p>
              </table:table-cell>
              <table:table-cell table:style-name="Table4.A2" office:value-type="string">
                <text:p text:style-name="P9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9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9">.ff<text:span text:style-name="T13"/></text:p>
              </table:table-cell>
            </table:table-row>
          </table:table>
          <text:p text:style-name="P16"><text:line-break/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8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6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6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6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6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6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6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6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6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6">ta/<text:span text:style-name="T13"/></text:p>
              </table:table-cell>
            </table:table-row>
          </table:table>
          <text:p text:style-name="P17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18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18"><text:span text:style-name="T14">(যু.ব্য.)</text:span>/ ⇔ //</text:p>
              </table:table-cell>
            </table:table-row>
          </table:table>
          <text:p text:style-name="P19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20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1">শু, রূ, হৃ</text:p>
              </table:table-cell>
              <table:table-cell table:style-name="Table8.A2" office:value-type="string">
                <text:p text:style-name="P22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1">শ‌ু, র‌ু, হ‌ৃ</text:p>
              </table:table-cell>
              <table:table-cell table:style-name="Table8.B3" office:value-type="string">
                <text:p text:style-name="P22">shuff, <text:span text:style-name="T21">ruff, hqff</text:span></text:p>
              </table:table-cell>
            </table:table-row>
          </table:table>
          <text:p text:style-name="P23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5-05T12:44:12Z</meta:creation-date>
    <dc:date>2026-05-28T14:47:29.328840046</dc:date>
    <meta:editing-duration>PT37M36S</meta:editing-duration>
    <meta:editing-cycles>15</meta:editing-cycles>
    <meta:document-statistic meta:table-count="8" meta:image-count="0" meta:object-count="0" meta:page-count="1" meta:paragraph-count="179" meta:word-count="293" meta:character-count="687" meta:non-whitespace-character-count="567"/>
  </office:meta>
</office:document-meta>
</file>