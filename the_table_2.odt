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8.96mm"/>
    </style:style>
    <style:style style:name="Table7.B" style:family="table-column">
      <style:table-column-properties style:column-width="25.75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7.29mm"/>
    </style:style>
    <style:style style:name="Table6.B" style:family="table-column">
      <style:table-column-properties style:column-width="26.86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Dark Courier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officeooo:paragraph-rsid="001537cc" style:font-size-asian="10pt" style:font-name-complex="Dark Courier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Dark Courier" style:font-size-complex="10pt" style:language-complex="bn" style:country-complex="BD"/>
    </style:style>
    <style:style style:name="P16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language="en" fo:country="US"/>
    </style:style>
    <style:style style:name="T19" style:family="text">
      <style:text-properties fo:color="#00008b" loext:opacity="100%" fo:font-weight="bold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7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6"><text:span text:style-name="T17">[zwnj]</text:span>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4"><text:span text:style-name="T10"/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6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6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6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6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6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6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6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6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6">ta/<text:span text:style-name="T13"/></text:p>
              </table:table-cell>
            </table:table-row>
          </table:table>
          <text:p text:style-name="P12"><text:span text:style-name="T18"><text:s/></text:span><text:span text:style-name="T12"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9">পৃথায়ক</text:span><text:span text:style-name="T11"> ⇔ ;</text:span></text:p>
              </table:table-cell>
              <table:table-cell table:style-name="Table6.A2" office:value-type="string">
                <text:p text:style-name="P15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9">স্লাইসার</text:span><text:span text:style-name="T11"> ⇔ /</text:span></text:p>
              </table:table-cell>
              <table:table-cell table:style-name="Table6.B3" office:value-type="string">
                <text:p text:style-name="P15"><text:span text:style-name="T14">(যু.ব্য.)</text:span>/ ⇔ //</text:p>
              </table:table-cell>
            </table:table-row>
          </table:table>
          <text:p text:style-name="P16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7T15:30:09.741188059</dc:date>
    <meta:editing-duration>PT33M9S</meta:editing-duration>
    <meta:editing-cycles>9</meta:editing-cycles>
    <meta:document-statistic meta:table-count="7" meta:image-count="0" meta:object-count="0" meta:page-count="1" meta:paragraph-count="173" meta:word-count="278" meta:character-count="628" meta:non-whitespace-character-count="519"/>
  </office:meta>
</office:document-meta>
</file>