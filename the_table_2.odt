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7.73mm"/>
    </style:style>
    <style:style style:name="Table7.B" style:family="table-column">
      <style:table-column-properties style:column-width="26.99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1.68mm"/>
    </style:style>
    <style:style style:name="Table6.B" style:family="table-column">
      <style:table-column-properties style:column-width="32.47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5.28mm"/>
    </style:style>
    <style:style style:name="Table8.B" style:family="table-column">
      <style:table-column-properties style:column-width="38.82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8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1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4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5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4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5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1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7"/>
          <text:p text:style-name="P17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8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8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8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8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8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8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8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8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8">ta/<text:span text:style-name="T13"/></text:p>
              </table:table-cell>
            </table:table-row>
          </table:table>
          <text:p text:style-name="P19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20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20"><text:span text:style-name="T14">(যু.ব্য.)</text:span>/ ⇔ //</text:p>
              </table:table-cell>
            </table:table-row>
          </table:table>
          <text:p text:style-name="P21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2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3">শু, রূ, হৃ</text:p>
              </table:table-cell>
              <table:table-cell table:style-name="Table8.A2" office:value-type="string">
                <text:p text:style-name="P24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3">শ‌ু, র‌ু, হ‌ৃ</text:p>
              </table:table-cell>
              <table:table-cell table:style-name="Table8.B3" office:value-type="string">
                <text:p text:style-name="P24">shuff,<text:span text:style-name="T21">ruff,hqff</text:span></text:p>
              </table:table-cell>
            </table:table-row>
          </table:table>
          <text:p text:style-name="P25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6:53:06.992598192</dc:date>
    <meta:editing-duration>PT40M56S</meta:editing-duration>
    <meta:editing-cycles>19</meta:editing-cycles>
    <meta:document-statistic meta:table-count="8" meta:image-count="0" meta:object-count="0" meta:page-count="1" meta:paragraph-count="178" meta:word-count="291" meta:character-count="684" meta:non-whitespace-character-count="567"/>
  </office:meta>
</office:document-meta>
</file>